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17B624EAE207D6516E4.png" manifest:media-type="image/png"/>
  <manifest:file-entry manifest:full-path="Pictures/10000000000003F5000001C9AFAB057C9025E8C4.png" manifest:media-type="image/png"/>
  <manifest:file-entry manifest:full-path="Pictures/100000000000026B000003DDC66CA77714314601.png" manifest:media-type="image/png"/>
  <manifest:file-entry manifest:full-path="Pictures/100000000000053B000002C846035F1424DE2896.png" manifest:media-type="image/png"/>
  <manifest:file-entry manifest:full-path="Pictures/10000000000004100000009BD4F373ED05086770.png" manifest:media-type="image/png"/>
  <manifest:file-entry manifest:full-path="Pictures/100000000000016D0000018FC2CAD5B656C1BB30.png" manifest:media-type="image/png"/>
  <manifest:file-entry manifest:full-path="Pictures/100000000000025E000003992643D9DB1FE9834F.png" manifest:media-type="image/png"/>
  <manifest:file-entry manifest:full-path="Pictures/10000000000003610000014F5C2E9B31CBBE5004.png" manifest:media-type="image/png"/>
  <manifest:file-entry manifest:full-path="Pictures/100000000000026B000003A7404F01BAF322D89F.png" manifest:media-type="image/png"/>
  <manifest:file-entry manifest:full-path="Pictures/1000000000000154000002419911FC1A64541776.png" manifest:media-type="image/png"/>
  <manifest:file-entry manifest:full-path="Pictures/1000000000000084000000F80CC6AEC080A297BC.png" manifest:media-type="image/png"/>
  <manifest:file-entry manifest:full-path="Pictures/10000000000000BA000000F69C5E60DA7A17F556.png" manifest:media-type="image/png"/>
  <manifest:file-entry manifest:full-path="Pictures/10000000000003560000006DB1DAEE18DA889296.png" manifest:media-type="image/png"/>
  <manifest:file-entry manifest:full-path="Pictures/100000000000044E00000383DC00904866A1D2B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5313in"/>
    </style:style>
    <style:style style:name="Table1.B" style:family="table-column">
      <style:table-column-properties style:column-width="4.9681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5451in" fo:keep-together="auto"/>
    </style:style>
    <style:style style:name="Table2" style:family="table">
      <style:table-properties style:width="5.25in" fo:margin-left="0in" fo:margin-top="0in" fo:margin-bottom="0in" table:align="left"/>
    </style:style>
    <style:style style:name="Table2.A" style:family="table-column">
      <style:table-column-properties style:column-width="1.4993in"/>
    </style:style>
    <style:style style:name="Table2.B" style:family="table-column">
      <style:table-column-properties style:column-width="3.75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2.A3" style:family="table-cell">
      <style:table-cell-properties style:vertical-align="" fo:background-color="#d9ead3" fo:padding="0.0694in" fo:border="0.5pt solid #000000">
        <style:background-image/>
      </style:table-cell-properties>
    </style:style>
    <style:style style:name="Table3" style:family="table">
      <style:table-properties style:width="6.375in" fo:margin-left="0in" fo:margin-top="0in" fo:margin-bottom="0in" table:align="left"/>
    </style:style>
    <style:style style:name="Table3.A" style:family="table-column">
      <style:table-column-properties style:column-width="1.2597in"/>
    </style:style>
    <style:style style:name="Table3.B" style:family="table-column">
      <style:table-column-properties style:column-width="5.1146in"/>
    </style:style>
    <style:style style:name="Table3.1" style:family="table-row">
      <style:table-row-properties style:min-row-height="0.3576in" fo:keep-together="auto"/>
    </style:style>
    <style:style style:name="Table3.A1" style:family="table-cell">
      <style:table-cell-properties style:vertical-align="" fo:padding="0.0694in" fo:border="0.5pt solid #000000"/>
    </style:style>
    <style:style style:name="Table4" style:family="table">
      <style:table-properties style:width="6.9479in" fo:margin-left="0in" fo:margin-top="0in" fo:margin-bottom="0in" table:align="left"/>
    </style:style>
    <style:style style:name="Table4.A" style:family="table-column">
      <style:table-column-properties style:column-width="1.8021in"/>
    </style:style>
    <style:style style:name="Table4.B" style:family="table-column">
      <style:table-column-properties style:column-width="5.1451in"/>
    </style:style>
    <style:style style:name="Table4.1" style:family="table-row">
      <style:table-row-properties style:min-row-height="0.3576in" fo:keep-together="auto"/>
    </style:style>
    <style:style style:name="Table4.A1" style:family="table-cell">
      <style:table-cell-properties style:vertical-align="" fo:padding="0.0694in" fo:border="0.5pt solid #000000"/>
    </style:style>
    <style:style style:name="Table5" style:family="table">
      <style:table-properties style:width="7.0313in" fo:margin-left="0in" fo:margin-top="0in" fo:margin-bottom="0in" table:align="left"/>
    </style:style>
    <style:style style:name="Table5.A" style:family="table-column">
      <style:table-column-properties style:column-width="1.7389in"/>
    </style:style>
    <style:style style:name="Table5.B" style:family="table-column">
      <style:table-column-properties style:column-width="1.8653in"/>
    </style:style>
    <style:style style:name="Table5.C" style:family="table-column">
      <style:table-column-properties style:column-width="3.4271in"/>
    </style:style>
    <style:style style:name="Table5.1" style:family="table-row">
      <style:table-row-properties style:min-row-height="0.3576in" fo:keep-together="auto"/>
    </style:style>
    <style:style style:name="Table5.A1" style:family="table-cell">
      <style:table-cell-properties style:vertical-align="" fo:padding="0.0694in" fo:border="0.5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9792in"/>
    </style:style>
    <style:style style:name="Table6.B" style:family="table-column">
      <style:table-column-properties style:column-width="4.5201in"/>
    </style:style>
    <style:style style:name="Table6.1" style:family="table-row">
      <style:table-row-properties style:min-row-height="0.3576in" fo:keep-together="auto"/>
    </style:style>
    <style:style style:name="Table6.A1" style:family="table-cell">
      <style:table-cell-properties style:vertical-align="" fo:padding="0.0694in" fo:border="0.5pt solid #000000"/>
    </style:style>
    <style:style style:name="Table6.2" style:family="table-row">
      <style:table-row-properties style:min-row-height="0.5451in" fo:keep-together="auto"/>
    </style:style>
    <style:style style:name="Table7" style:family="table">
      <style:table-properties style:width="6.9583in" fo:margin-left="0in" fo:margin-top="0in" fo:margin-bottom="0in" table:align="left"/>
    </style:style>
    <style:style style:name="Table7.A" style:family="table-column">
      <style:table-column-properties style:column-width="2.1458in"/>
    </style:style>
    <style:style style:name="Table7.B" style:family="table-column">
      <style:table-column-properties style:column-width="4.8118in"/>
    </style:style>
    <style:style style:name="Table7.1" style:family="table-row">
      <style:table-row-properties style:min-row-height="0.3576in" fo:keep-together="auto"/>
    </style:style>
    <style:style style:name="Table7.A1" style:family="table-cell">
      <style:table-cell-properties style:vertical-align="" fo:padding="0.0694in" fo:border="0.5pt solid #000000"/>
    </style:style>
    <style:style style:name="Table8" style:family="table">
      <style:table-properties style:width="6.9167in" fo:margin-left="0in" fo:margin-top="0in" fo:margin-bottom="0in" table:align="left"/>
    </style:style>
    <style:style style:name="Table8.A" style:family="table-column">
      <style:table-column-properties style:column-width="3.3535in"/>
    </style:style>
    <style:style style:name="Table8.B" style:family="table-column">
      <style:table-column-properties style:column-width="3.5625in"/>
    </style:style>
    <style:style style:name="Table8.1" style:family="table-row">
      <style:table-row-properties style:min-row-height="0.3576in" fo:keep-together="auto"/>
    </style:style>
    <style:style style:name="Table8.A1" style:family="table-cell">
      <style:table-cell-properties style:vertical-align="" fo:padding="0.0694in" fo:border="0.5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6979in" fo:margin-left="0in" fo:margin-top="0in" fo:margin-bottom="0in" table:align="left"/>
    </style:style>
    <style:style style:name="Table10.A" style:family="table-column">
      <style:table-column-properties style:column-width="2.0313in"/>
    </style:style>
    <style:style style:name="Table10.B" style:family="table-column">
      <style:table-column-properties style:column-width="4.666in"/>
    </style:style>
    <style:style style:name="Table10.1" style:family="table-row">
      <style:table-row-properties style:min-row-height="0.434in" fo:keep-together="auto"/>
    </style:style>
    <style:style style:name="Table10.A1" style:family="table-cell">
      <style:table-cell-properties style:vertical-align="" fo:padding="0.0694in" fo:border="0.5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0.4771in"/>
    </style:style>
    <style:style style:name="Table11.B" style:family="table-column">
      <style:table-column-properties style:column-width="6.0222in"/>
    </style:style>
    <style:style style:name="Table11.1" style:family="table-row">
      <style:table-row-properties style:min-row-height="0.3576in" fo:keep-together="auto"/>
    </style:style>
    <style:style style:name="Table11.A1" style:family="table-cell">
      <style:table-cell-properties style:vertical-align="" fo:padding="0.0694in" fo:border="0.5pt solid #000000"/>
    </style:style>
    <style:style style:name="Table11.2" style:family="table-row">
      <style:table-row-properties style:min-row-height="0.5451in" fo:keep-together="auto"/>
    </style:style>
    <style:style style:name="Table12" style:family="table">
      <style:table-properties style:width="6.7813in" fo:margin-left="0in" fo:margin-top="0in" fo:margin-bottom="0in" table:align="left"/>
    </style:style>
    <style:style style:name="Table12.A" style:family="table-column">
      <style:table-column-properties style:column-width="0.4896in"/>
    </style:style>
    <style:style style:name="Table12.B" style:family="table-column">
      <style:table-column-properties style:column-width="6.291in"/>
    </style:style>
    <style:style style:name="Table12.1" style:family="table-row">
      <style:table-row-properties style:min-row-height="0.3576in" fo:keep-together="auto"/>
    </style:style>
    <style:style style:name="Table12.A1" style:family="table-cell">
      <style:table-cell-properties style:vertical-align="" fo:padding="0.0694in" fo:border="0.5pt solid #000000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2.3722in"/>
    </style:style>
    <style:style style:name="Table13.B" style:family="table-column">
      <style:table-column-properties style:column-width="1.8257in"/>
    </style:style>
    <style:style style:name="Table13.C" style:family="table-column">
      <style:table-column-properties style:column-width="2.3021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3.2" style:family="table-row">
      <style:table-row-properties style:min-row-height="0.5451in" fo:keep-together="auto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0.5507in"/>
    </style:style>
    <style:style style:name="Table14.B" style:family="table-column">
      <style:table-column-properties style:column-width="1.7174in"/>
    </style:style>
    <style:style style:name="Table14.C" style:family="table-column">
      <style:table-column-properties style:column-width="1.6875in"/>
    </style:style>
    <style:style style:name="Table14.D" style:family="table-column">
      <style:table-column-properties style:column-width="2.5438in"/>
    </style:style>
    <style:style style:name="Table14.1" style:family="table-row">
      <style:table-row-properties style:min-row-height="0.5451in" fo:keep-together="auto"/>
    </style:style>
    <style:style style:name="Table14.A1" style:family="table-cell">
      <style:table-cell-properties style:vertical-align="" fo:padding="0.0694in" fo:border="0.5pt solid #000000"/>
    </style:style>
    <style:style style:name="Table14.6" style:family="table-row">
      <style:table-row-properties style:min-row-height="0.357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fo:font-size="17pt" fo:font-weight="bold" style:font-size-asian="17pt" style:font-weight-asian="bold" style:font-size-complex="17pt" style:font-weight-complex="bold"/>
    </style:style>
    <style:style style:name="P6" style:family="paragraph" style:parent-style-name="Standard">
      <style:paragraph-properties fo:margin-top="0.1665in" fo:margin-bottom="0.1665in" loext:contextual-spacing="false" fo:line-height="100%" fo:break-before="page"/>
    </style:style>
    <style:style style:name="P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8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9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1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2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3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4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6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9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0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1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2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4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5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6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1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2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3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4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1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3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3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3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2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2" style:family="paragraph" style:parent-style-name="Standard" style:list-style-name="WWNum1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3" style:family="paragraph" style:parent-style-name="Standard" style:list-style-name="WWNum2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4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05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106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fo:font-size="23pt" fo:font-weight="bold" style:font-size-asian="23pt" style:font-weight-asian="bold" style:font-size-complex="23pt" style:font-weight-complex="bold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 style:master-page-name="Standard">
      <style:paragraph-properties style:page-number="1"/>
    </style:style>
    <style:style style:name="P109" style:family="paragraph" style:parent-style-name="Heading_20_3">
      <style:paragraph-properties fo:margin-top="0.222in" fo:margin-bottom="0.0555in" loext:contextual-spacing="false" fo:line-height="100%" fo:keep-together="auto" fo:keep-with-next="auto"/>
    </style:style>
    <style:style style:name="P110" style:family="paragraph" style:parent-style-name="Heading_20_3">
      <style:paragraph-properties fo:margin-top="0.222in" fo:margin-bottom="0.0555in" loext:contextual-spacing="false" fo:line-height="100%" fo:keep-together="auto" fo:break-before="page" fo:keep-with-next="auto"/>
    </style:style>
    <style:style style:name="P11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12" style:family="paragraph" style:parent-style-name="Heading_20_2">
      <style:paragraph-properties fo:margin-top="0.3335in" fo:margin-bottom="0.0835in" loext:contextual-spacing="false" fo:line-height="100%" fo:keep-together="auto" fo:keep-with-next="auto"/>
    </style:style>
    <style:style style:name="P113" style:family="paragraph" style:parent-style-name="Heading_20_2">
      <style:paragraph-properties fo:margin-top="0.3335in" fo:margin-bottom="0.0835in" loext:contextual-spacing="false" fo:line-height="100%" fo:keep-together="auto" fo:break-before="page" fo:keep-with-next="auto"/>
    </style:style>
    <style:style style:name="P114" style:family="paragraph" style:parent-style-name="Heading_20_2">
      <style:paragraph-properties fo:margin-top="0.1665in" fo:margin-bottom="0.1665in" loext:contextual-spacing="false" fo:line-height="100%"/>
    </style:style>
    <style:style style:name="P115" style:family="paragraph" style:parent-style-name="Heading_20_2">
      <style:paragraph-properties fo:margin-top="0.1665in" fo:margin-bottom="0.1665in" loext:contextual-spacing="false" fo:line-height="100%" fo:break-before="page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text:bookmark text:name="_oatk5oigw22i"/>1. Solution Architecture</text:p>
      <text:p text:style-name="Heading_20_2"><text:bookmark text:name="_of9qy686wpfz"/>1.1 Overview</text:p>
      <text:p text:style-name="P3">The proposed solution is designed following Salesforce Well-Architected principles by separating presentation, orchestration, business logic, integration, and data persistence into independent layers.</text:p>
      <text:p text:style-name="P3">The solution leverages Salesforce Experience Cloud as the citizen-facing portal, Lightning Web Components (LWC) for the user interface, Flow for declarative orchestration, Apex for complex business logic and integrations, and Custom Metadata Types to support configurable business rules.</text:p>
      <text:p text:style-name="P3">The architecture follows the principle of using declarative capabilities whenever possible while reserving Apex for scenarios requiring complex calculations, reusable business logic, or performance-critical processing.</text:p>
      <text:p text:style-name="Standard"/>
      <text:p text:style-name="Heading_20_2"><text:bookmark text:name="_t2zwdqyigoc"/>1.2 Architecture Principles</text:p>
      <text:p text:style-name="P3">The solution is designed based on the following principles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span text:style-name="T1">Principle</text:span></text:p>
            </table:table-cell>
            <table:table-cell table:style-name="Table1.A1" office:value-type="string">
              <text:p text:style-name="P1"><text:span text:style-name="T1">Implementation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Standard"><text:span text:style-name="T2">Configuration over Customization</text:span></text:p>
          </table:table-cell>
          <table:table-cell table:style-name="Table1.A1" office:value-type="string">
            <text:p text:style-name="Standard"><text:span text:style-name="T2">Business rules are stored in Custom Metadata Types whenever possible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Separation of Concerns</text:span></text:p>
          </table:table-cell>
          <table:table-cell table:style-name="Table1.A1" office:value-type="string">
            <text:p text:style-name="Standard"><text:span text:style-name="T2">UI, orchestration, business logic, integration, and persistence are implemented independently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Reusability</text:span></text:p>
          </table:table-cell>
          <table:table-cell table:style-name="Table1.A1" office:value-type="string">
            <text:p text:style-name="Standard"><text:span text:style-name="T2">Business services are implemented as reusable Apex service classes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Scalability</text:span></text:p>
          </table:table-cell>
          <table:table-cell table:style-name="Table1.A1" office:value-type="string">
            <text:p text:style-name="Standard"><text:span text:style-name="T2">Business logic is bulkified and designed for large-volume processing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Security by Design</text:span></text:p>
          </table:table-cell>
          <table:table-cell table:style-name="Table1.A1" office:value-type="string">
            <text:p text:style-name="Standard"><text:span text:style-name="T2">Named Credentials, Sharing Model, Permission Sets, and Experience Cloud Profiles are used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Maintainability</text:span></text:p>
          </table:table-cell>
          <table:table-cell table:style-name="Table1.A1" office:value-type="string">
            <text:p text:style-name="Standard"><text:span text:style-name="T2">Simple automation uses Flow while complex logic is implemented in Apex.</text:span></text:p>
          </table:table-cell>
        </table:table-row>
      </table:table>
      <text:p text:style-name="Heading_20_2"><text:bookmark text:name="_triapvioudzg"/>1.3 High-Level Solution Architecture</text:p>
      <text:p text:style-name="Standard"/>
      <text:p text:style-name="Standard"><draw:frame draw:style-name="fr1" draw:name="image3.png" text:anchor-type="as-char" svg:width="6.5in" svg:height="3.4583in" draw:z-index="0"><draw:image xlink:href="Pictures/100000000000053B000002C846035F1424DE2896.png" xlink:type="simple" xlink:show="embed" xlink:actuate="onLoad" loext:mime-type="image/png"/></draw:frame></text:p>
      <text:p text:style-name="P112"><text:bookmark text:name="_hbzkthkhgfvi"/>1.4 Architecture Reasoning</text:p>
      <text:p text:style-name="P3">The architecture separates each responsibility into an independent layer.</text:p>
      <text:p text:style-name="P3"><text:soft-page-break/>Experience Cloud provides the public-facing portal for citizens.</text:p>
      <text:p text:style-name="P3">Lightning Web Components are responsible only for user experience, client-side validation, and request submission.</text:p>
      <text:p text:style-name="P3">Flow orchestrates declarative processes such as notifications, routing, and simple business automation. This allows administrators to modify business processes without requiring code deployment.</text:p>
      <text:p text:style-name="P3">Complex business logic, integrations, grant calculations, redistribution algorithms, and bulk processing are implemented within Apex Service Classes. This improves testability, scalability, and maintainability.</text:p>
      <text:p text:style-name="P3">Business configuration such as grant options, eligibility thresholds, and future support schemes are externalized into Custom Metadata Types instead of hardcoded Apex logic.</text:p>
      <text:p text:style-name="P3">External systems are integrated through Named Credentials and REST APIs to provide secure authentication while avoiding hardcoded credentials.</text:p>
      <text:p text:style-name="Heading_20_2"><text:bookmark text:name="_8gpqz53dp88g"/>1.5 Layered Architecture</text:p>
      <text:p text:style-name="P2"/>
      <text:p text:style-name="Standard"><draw:frame draw:style-name="fr1" draw:name="image6.png" text:anchor-type="as-char" svg:width="4.7701in" svg:height="7.2547in" draw:z-index="0"><draw:image xlink:href="Pictures/100000000000025E000003992643D9DB1FE9834F.png" xlink:type="simple" xlink:show="embed" xlink:actuate="onLoad" loext:mime-type="image/png"/></draw:frame></text:p>
      <text:p text:style-name="P105"><text:bookmark text:name="_a6jl9wks917g"/></text:p>
      <text:p text:style-name="P112"><text:bookmark text:name="_mumtglfqf8ny"/>1.6 Why Flow Instead of Apex?</text:p>
      <text:p text:style-name="P3">The solution intentionally follows a declarative-first architecture.</text:p>
      <text:p text:style-name="P3">Flow is used for:</text:p>
      <text:list xml:id="list681764350" text:style-name="WWNum11">
        <text:list-item>
          <text:p text:style-name="P7">Record orchestration</text:p>
        </text:list-item>
        <text:list-item>
          <text:p text:style-name="P38">Notifications</text:p>
        </text:list-item>
        <text:list-item>
          <text:p text:style-name="P38">Approval routing</text:p>
        </text:list-item>
        <text:list-item>
          <text:p text:style-name="P38">Assignment</text:p>
        </text:list-item>
        <text:list-item>
          <text:p text:style-name="P66">Simple business automation</text:p>
        </text:list-item>
      </text:list>
      <text:p text:style-name="P3">Apex is reserved for:</text:p>
      <text:list xml:id="list2533555072" text:style-name="WWNum10">
        <text:list-item>
          <text:p text:style-name="P8">Complex grant calculations</text:p>
        </text:list-item>
        <text:list-item>
          <text:p text:style-name="P39">Redistribution logic</text:p>
        </text:list-item>
        <text:list-item>
          <text:p text:style-name="P39"><text:soft-page-break/>External REST integrations</text:p>
        </text:list-item>
        <text:list-item>
          <text:p text:style-name="P39">Bulk upload processing</text:p>
        </text:list-item>
        <text:list-item>
          <text:p text:style-name="P39">Performance-critical algorithms</text:p>
        </text:list-item>
        <text:list-item>
          <text:p text:style-name="P67">Reusable enterprise services</text:p>
        </text:list-item>
      </text:list>
      <text:p text:style-name="P3">This design minimizes technical debt while ensuring future maintainability.</text:p>
      <text:p text:style-name="P3"/>
      <text:p text:style-name="P114"><text:bookmark text:name="_29x47ij1yg0b"/>1.7 Service Layer Design</text:p>
      <text:p text:style-name="P3"><draw:frame draw:style-name="fr1" draw:name="image14.png" text:anchor-type="as-char" svg:width="6.5in" svg:height="2.5in" draw:z-index="0"><draw:image xlink:href="Pictures/10000000000003610000014F5C2E9B31CBBE5004.png" xlink:type="simple" xlink:show="embed" xlink:actuate="onLoad" loext:mime-type="image/png"/></draw:frame></text:p>
      <text:p text:style-name="P5"/>
      <text:p text:style-name="P114"><text:bookmark text:name="_caxgetndpzrh"/>1.8 Business Flow</text:p>
      <text:p text:style-name="P3"><draw:frame draw:style-name="fr1" draw:name="image8.png" text:anchor-type="as-char" svg:width="4.4307in" svg:height="6.6925in" draw:z-index="0"><draw:image xlink:href="Pictures/100000000000026B000003A7404F01BAF322D89F.png" xlink:type="simple" xlink:show="embed" xlink:actuate="onLoad" loext:mime-type="image/png"/></draw:frame></text:p>
      <text:p text:style-name="P3"/>
      <text:p text:style-name="P3"/>
      <text:p text:style-name="P3"/>
      <text:p text:style-name="P112"><text:bookmark text:name="_nhxwzu8iukin"/></text:p>
      <text:p text:style-name="P113"><text:bookmark text:name="_36okxblfkcrw"/><text:span text:style-name="T3">1.9. Scope</text:span></text:p>
      <text:p text:style-name="P109"><text:bookmark text:name="_bu14n7tqe0xk"/><text:span text:style-name="T3">In Scope</text:span></text:p>
      <text:p text:style-name="P3">This solution addresses the functional and technical requirements described in the GovTech Technical Assessment.</text:p>
      <text:p text:style-name="P3">The proposed solution includes:</text:p>
      <text:list xml:id="list1709284511" text:style-name="WWNum34">
        <text:list-item>
          <text:p text:style-name="P9">Citizen self-service application through Experience Cloud.</text:p>
        </text:list-item>
        <text:list-item>
          <text:p text:style-name="P40">Grant application submission using Lightning Web Components.</text:p>
        </text:list-item>
        <text:list-item>
          <text:p text:style-name="P40">Contact management.</text:p>
        </text:list-item>
        <text:list-item>
          <text:p text:style-name="P40">Grant application management.</text:p>
        </text:list-item>
        <text:list-item>
          <text:p text:style-name="P40">Grant disbursement schedule generation.</text:p>
        </text:list-item>
        <text:list-item>
          <text:p text:style-name="P40">Eligibility validation.</text:p>
        </text:list-item>
        <text:list-item>
          <text:p text:style-name="P40">Integration with the external Master Data Management (MDM) system.</text:p>
        </text:list-item>
        <text:list-item>
          <text:p text:style-name="P40">Document upload using Salesforce Files.</text:p>
        </text:list-item>
        <text:list-item>
          <text:p text:style-name="P40">Administrator-configurable grant options using Custom Metadata Types.</text:p>
        </text:list-item>
        <text:list-item>
          <text:p text:style-name="P40">Centralized exception handling and operational monitoring.</text:p>
        </text:list-item>
        <text:list-item>
          <text:p text:style-name="P40">Security architecture based on Salesforce security best practices.</text:p>
        </text:list-item>
        <text:list-item>
          <text:p text:style-name="P68">Solution Architecture documentation.</text:p>
        </text:list-item>
      </text:list>
      <text:p text:style-name="P109"><text:bookmark text:name="_pvzvkbiy5j08"/><text:span text:style-name="T3">Out of Scope</text:span></text:p>
      <text:p text:style-name="P3">The following items are intentionally excluded from this assessment because they are outside the stated business requirements.</text:p>
      <text:list xml:id="list3362507700" text:style-name="WWNum17">
        <text:list-item>
          <text:p text:style-name="P10">Payment gateway implementation.</text:p>
        </text:list-item>
        <text:list-item>
          <text:p text:style-name="P41">Identity Provider (SSO) implementation.</text:p>
        </text:list-item>
        <text:list-item>
          <text:p text:style-name="P41">Infrastructure provisioning.</text:p>
        </text:list-item>
        <text:list-item>
          <text:p text:style-name="P41"><text:soft-page-break/>CI/CD pipeline implementation.</text:p>
        </text:list-item>
        <text:list-item>
          <text:p text:style-name="P41">Monitoring platform implementation.</text:p>
        </text:list-item>
        <text:list-item>
          <text:p text:style-name="P41">Salesforce environment strategy.</text:p>
        </text:list-item>
        <text:list-item>
          <text:p text:style-name="P41">License estimation.</text:p>
        </text:list-item>
        <text:list-item>
          <text:p text:style-name="P41">Disaster recovery implementation.</text:p>
        </text:list-item>
        <text:list-item>
          <text:p text:style-name="P41">Production deployment planning.</text:p>
        </text:list-item>
        <text:list-item>
          <text:p text:style-name="P41">External financial system implementation.</text:p>
        </text:list-item>
        <text:list-item>
          <text:p text:style-name="P41">Data migration from legacy systems.</text:p>
        </text:list-item>
        <text:list-item>
          <text:p text:style-name="P41">Performance testing.</text:p>
        </text:list-item>
        <text:list-item>
          <text:p text:style-name="P41">User training.</text:p>
        </text:list-item>
        <text:list-item>
          <text:p text:style-name="P69">Operational support procedures.</text:p>
        </text:list-item>
      </text:list>
      <text:p text:style-name="Heading_20_1"><text:bookmark text:name="_jwhytuv8mjzu"/></text:p>
      <text:p text:style-name="P107"><text:bookmark text:name="_tgcs0os8wvca"/>2. Data Architecture</text:p>
      <text:p text:style-name="Heading_20_2"><text:bookmark text:name="_r2l7jc9a57ap"/>2.1 Overview</text:p>
      <text:p text:style-name="P3">The proposed data model separates master data from transactional data to improve maintainability, scalability, reporting capability, and future extensibility.</text:p>
      <text:p text:style-name="P3">Instead of storing all business information directly within the Contact object, the solution introduces a dedicated <text:span text:style-name="T4">Grant Application</text:span> object and <text:span text:style-name="T4">Grant Disbursement</text:span> object.</text:p>
      <text:p text:style-name="P3">This approach enables multiple grant applications to be associated with a single citizen while preserving application history and supporting future business enhancements without modifying the core Contact record.</text:p>
      <text:p text:style-name="P112"><text:bookmark text:name="_ig4bbtsxu867"/>2.2 Entity Relationship Diagram</text:p>
      <text:p text:style-name="Standard"><draw:frame draw:style-name="fr1" draw:name="image11.png" text:anchor-type="as-char" svg:width="2.9425in" svg:height="4.998in" draw:z-index="0"><draw:image xlink:href="Pictures/1000000000000154000002419911FC1A64541776.png" xlink:type="simple" xlink:show="embed" xlink:actuate="onLoad" loext:mime-type="image/png"/></draw:frame></text:p>
      <text:p text:style-name="Standard"/>
      <text:p text:style-name="Standard"/>
      <text:p text:style-name="Heading_20_2"><text:bookmark text:name="_vsznu9vgyo2v"/>2.3 Data Ownership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3">Object</text:span></text:p>
          </table:table-cell>
          <table:table-cell table:style-name="Table2.A1" office:value-type="string">
            <text:p text:style-name="P1"><text:span text:style-name="T3">Purpose</text:span></text:p>
          </table:table-cell>
        </table:table-row>
        <table:table-row table:style-name="Table2.1">
          <table:table-cell table:style-name="Table2.A1" office:value-type="string">
            <text:p text:style-name="Standard">Contact</text:p>
          </table:table-cell>
          <table:table-cell table:style-name="Table2.A1" office:value-type="string">
            <text:p text:style-name="Standard">Citizen master profile</text:p>
          </table:table-cell>
        </table:table-row>
        <table:table-row table:style-name="Table2.1">
          <table:table-cell table:style-name="Table2.A3" office:value-type="string">
            <text:p text:style-name="Standard">Grant Application</text:p>
          </table:table-cell>
          <table:table-cell table:style-name="Table2.A3" office:value-type="string">
            <text:p text:style-name="Standard">Individual grant application</text:p>
          </table:table-cell>
        </table:table-row>
        <table:table-row table:style-name="Table2.1">
          <table:table-cell table:style-name="Table2.A1" office:value-type="string">
            <text:p text:style-name="Standard">Grant Disbursement</text:p>
          </table:table-cell>
          <table:table-cell table:style-name="Table2.A1" office:value-type="string">
            <text:p text:style-name="Standard">Monthly payment schedule</text:p>
          </table:table-cell>
        </table:table-row>
        <table:table-row table:style-name="Table2.1">
          <table:table-cell table:style-name="Table2.A1" office:value-type="string">
            <text:p text:style-name="Standard">Case</text:p>
          </table:table-cell>
          <table:table-cell table:style-name="Table2.A1" office:value-type="string">
            <text:p text:style-name="Standard">Citizen enquiries</text:p>
          </table:table-cell>
        </table:table-row>
        <table:table-row table:style-name="Table2.1">
          <table:table-cell table:style-name="Table2.A1" office:value-type="string">
            <text:p text:style-name="Standard">Knowledge</text:p>
          </table:table-cell>
          <table:table-cell table:style-name="Table2.A1" office:value-type="string">
            <text:p text:style-name="Standard">Knowledge articles for support agents</text:p>
          </table:table-cell>
        </table:table-row>
        <table:table-row table:style-name="Table2.1">
          <table:table-cell table:style-name="Table2.A1" office:value-type="string">
            <text:p text:style-name="Standard">ContentDocument</text:p>
          </table:table-cell>
          <table:table-cell table:style-name="Table2.A1" office:value-type="string">
            <text:p text:style-name="Standard">Uploaded supporting documents</text:p>
          </table:table-cell>
        </table:table-row>
      </table:table>
      <text:p text:style-name="Standard"/>
      <text:p text:style-name="P112"><text:bookmark text:name="_cm1idqt59p23"/>2.4 Why Introduce Grant Application?</text:p>
      <text:p text:style-name="P3">Although the requirement only requires <text:span text:style-name="T3">Contact</text:span> and <text:span text:style-name="T3">Grant Disbursement</text:span> records, introducing a <text:span text:style-name="T3">Grant Application</text:span> object significantly improves the overall architecture.</text:p>
      <text:p text:style-name="P3"><text:soft-page-break/>Benefits include:</text:p>
      <text:list xml:id="list1038046797" text:style-name="WWNum9">
        <text:list-item>
          <text:p text:style-name="P11">Separation between master data and transactional data.</text:p>
        </text:list-item>
        <text:list-item>
          <text:p text:style-name="P42">Preservation of application history.</text:p>
        </text:list-item>
        <text:list-item>
          <text:p text:style-name="P42">Support for multiple applications submitted by the same citizen.</text:p>
        </text:list-item>
        <text:list-item>
          <text:p text:style-name="P42">Improved reporting capabilities.</text:p>
        </text:list-item>
        <text:list-item>
          <text:p text:style-name="P42">Easier implementation of future business requirements.</text:p>
        </text:list-item>
        <text:list-item>
          <text:p text:style-name="P70">Better normalization of the data model.</text:p>
        </text:list-item>
      </text:list>
      <text:p text:style-name="P3">This design aligns with enterprise CRM modeling practices.</text:p>
      <text:p text:style-name="P3"/>
      <text:p text:style-name="P3"/>
      <text:p text:style-name="Heading_20_2"><text:bookmark text:name="_iquf3bzi57zy"/></text:p>
      <text:p text:style-name="P116"><text:bookmark text:name="_fdznds9w9r47"/>2.5 Object Relationships</text:p>
      <text:p text:style-name="Standard"><draw:frame draw:style-name="fr1" draw:name="image12.png" text:anchor-type="as-char" svg:width="1.3752in" svg:height="2.5835in" draw:z-index="0"><draw:image xlink:href="Pictures/1000000000000084000000F80CC6AEC080A297BC.png" xlink:type="simple" xlink:show="embed" xlink:actuate="onLoad" loext:mime-type="image/png"/></draw:frame></text:p>
      <text:p text:style-name="Standard"/>
      <text:p text:style-name="Heading_20_2"><text:bookmark text:name="_q76w66pu1cac"/>2.6 Application Lifecycle</text:p>
      <text:p text:style-name="Standard"><draw:frame draw:style-name="fr1" draw:name="image2.png" text:anchor-type="as-char" svg:width="7.0154in" svg:height="1.0339in" draw:z-index="0"><draw:image xlink:href="Pictures/10000000000004100000009BD4F373ED05086770.png" xlink:type="simple" xlink:show="embed" xlink:actuate="onLoad" loext:mime-type="image/png"/></draw:frame></text:p>
      <text:p text:style-name="Standard"/>
      <text:p text:style-name="Heading_20_2"><text:bookmark text:name="_pw5is43lap4f"/>2.7 Grant Disbursement Lifecycle</text:p>
      <text:p text:style-name="Standard"><draw:frame draw:style-name="fr1" draw:name="image5.png" text:anchor-type="as-char" svg:width="6.5in" svg:height="0.8193in" draw:z-index="0"><draw:image xlink:href="Pictures/10000000000003560000006DB1DAEE18DA889296.png" xlink:type="simple" xlink:show="embed" xlink:actuate="onLoad" loext:mime-type="image/png"/></draw:frame></text:p>
      <text:p text:style-name="Standard"/>
      <text:p text:style-name="Heading_20_2"><text:bookmark text:name="_ls6pzed3pf7c"/></text:p>
      <text:p text:style-name="P116"><text:bookmark text:name="_j8bi0gtwm2k2"/>2.8 Data Validation Strategy</text:p>
      <text:p text:style-name="P3">Data validation is implemented using multiple validation layers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Layer</text:span></text:p>
          </table:table-cell>
          <table:table-cell table:style-name="Table3.A1" office:value-type="string">
            <text:p text:style-name="P1"><text:span text:style-name="T3">Responsibility</text:span></text:p>
          </table:table-cell>
        </table:table-row>
        <table:table-row table:style-name="Table3.1">
          <table:table-cell table:style-name="Table3.A1" office:value-type="string">
            <text:p text:style-name="Standard">LWC</text:p>
          </table:table-cell>
          <table:table-cell table:style-name="Table3.A1" office:value-type="string">
            <text:p text:style-name="Standard">User experience validation</text:p>
          </table:table-cell>
        </table:table-row>
        <table:table-row table:style-name="Table3.1">
          <table:table-cell table:style-name="Table3.A1" office:value-type="string">
            <text:p text:style-name="Standard">Validation Rules</text:p>
          </table:table-cell>
          <table:table-cell table:style-name="Table3.A1" office:value-type="string">
            <text:p text:style-name="Standard">Standard field validation</text:p>
          </table:table-cell>
        </table:table-row>
        <table:table-row table:style-name="Table3.1">
          <table:table-cell table:style-name="Table3.A1" office:value-type="string">
            <text:p text:style-name="Standard">Apex</text:p>
          </table:table-cell>
          <table:table-cell table:style-name="Table3.A1" office:value-type="string">
            <text:p text:style-name="Standard">Cross-object validation and complex business rules</text:p>
          </table:table-cell>
        </table:table-row>
        <table:table-row table:style-name="Table3.1">
          <table:table-cell table:style-name="Table3.A1" office:value-type="string">
            <text:p text:style-name="Standard">Trigger</text:p>
          </table:table-cell>
          <table:table-cell table:style-name="Table3.A1" office:value-type="string">
            <text:p text:style-name="Standard">Data integrity enforcement</text:p>
          </table:table-cell>
        </table:table-row>
        <table:table-row table:style-name="Table3.1">
          <table:table-cell table:style-name="Table3.A1" office:value-type="string">
            <text:p text:style-name="Standard">Database</text:p>
          </table:table-cell>
          <table:table-cell table:style-name="Table3.A1" office:value-type="string">
            <text:p text:style-name="Standard">Referential integrity</text:p>
          </table:table-cell>
        </table:table-row>
      </table:table>
      <text:p text:style-name="P3">The layered validation approach prevents invalid data from entering the system while providing immediate feedback to end users.</text:p>
      <text:p text:style-name="P112"><text:bookmark text:name="_vfev0pvry085"/>2.9 Configurable Business Rules</text:p>
      <text:p text:style-name="P3">The solution avoids hardcoded business logic by externalizing configurable values into Custom Metadata Types.</text:p>
      <text:p text:style-name="Standard"><draw:frame draw:style-name="fr1" draw:name="image7.png" text:anchor-type="as-char" svg:width="1.9307in" svg:height="2.5555in" draw:z-index="0"><draw:image xlink:href="Pictures/10000000000000BA000000F69C5E60DA7A17F556.png" xlink:type="simple" xlink:show="embed" xlink:actuate="onLoad" loext:mime-type="image/png"/></draw:frame></text:p>
      <text:p text:style-name="Standard">Administrators can introduce new grant schemes or modify existing configurations without requiring Apex code changes or deployments.</text:p>
      <text:p text:style-name="Standard"/>
      <text:p text:style-name="P112"><text:bookmark text:name="_3n90knicy578"/></text:p>
      <text:p text:style-name="P113"><text:bookmark text:name="_56o7ue7nqgh"/>2.10 Future Scalability</text:p>
      <text:p text:style-name="P3">The proposed data model supports future enhancements including:</text:p>
      <text:list xml:id="list253912068" text:style-name="WWNum31">
        <text:list-item>
          <text:p text:style-name="P12">Multiple grant programs.</text:p>
        </text:list-item>
        <text:list-item>
          <text:p text:style-name="P43">Multiple applications per citizen.</text:p>
        </text:list-item>
        <text:list-item>
          <text:p text:style-name="P43">Additional verification stages.</text:p>
        </text:list-item>
        <text:list-item>
          <text:p text:style-name="P43">Appeals and reassessments.</text:p>
        </text:list-item>
        <text:list-item>
          <text:p text:style-name="P43">Payment integrations.</text:p>
        </text:list-item>
        <text:list-item>
          <text:p text:style-name="P43">Audit history.</text:p>
        </text:list-item>
        <text:list-item>
          <text:p text:style-name="P43">Government reporting.</text:p>
        </text:list-item>
        <text:list-item>
          <text:p text:style-name="P71">Historical grant analytics.</text:p>
        </text:list-item>
      </text:list>
      <text:p text:style-name="P3">The architecture minimizes future schema changes while maintaining backward compatibility.</text:p>
      <text:p text:style-name="Heading_20_1"><text:bookmark text:name="_xu00xsqtys0z"/></text:p>
      <text:p text:style-name="P107"><text:bookmark text:name="_95vw2gbia6q3"/>3. Application Architecture</text:p>
      <text:p text:style-name="Heading_20_2"><text:bookmark text:name="_ey64iv5dio78"/>3.1 Overview</text:p>
      <text:p text:style-name="P3">The application layer is designed following the principles of loose coupling, high cohesion, and separation of responsibilities.</text:p>
      <text:p text:style-name="P3">Business logic is encapsulated within reusable Apex service classes while Lightning Web Components (LWC) remain responsible only for user interaction and presentation.</text:p>
      <text:p text:style-name="P3">Declarative automation is implemented using Salesforce Flow wherever appropriate, while Apex is reserved exclusively for complex processing that cannot be efficiently implemented using declarative tools.</text:p>
      <text:p text:style-name="P3">This architecture minimizes technical debt while improving maintainability and long-term scalability.</text:p>
      <text:p text:style-name="P114"><text:bookmark text:name="_fhf21ofcd5yg"/>3.2 Application Layer Overview</text:p>
      <text:p text:style-name="Standard"><draw:frame draw:style-name="fr1" draw:name="image10.png" text:anchor-type="as-char" svg:width="6.5in" svg:height="5.2917in" draw:z-index="0"><draw:image xlink:href="Pictures/100000000000044E00000383DC00904866A1D2B6.png" xlink:type="simple" xlink:show="embed" xlink:actuate="onLoad" loext:mime-type="image/png"/></draw:frame></text:p>
      <text:p text:style-name="Standard"/>
      <text:p text:style-name="P112"><text:bookmark text:name="_9dumdvn13ypu"/></text:p>
      <text:p text:style-name="P113"><text:bookmark text:name="_snct8e8gcc60"/>3.3 Business Service Responsibilitie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3">Service</text:span></text:p>
          </table:table-cell>
          <table:table-cell table:style-name="Table4.A1" office:value-type="string">
            <text:p text:style-name="P1"><text:span text:style-name="T3">Responsibility</text:span></text:p>
          </table:table-cell>
        </table:table-row>
        <table:table-row table:style-name="Table4.1">
          <table:table-cell table:style-name="Table4.A1" office:value-type="string">
            <text:p text:style-name="Standard">ApplicationService</text:p>
          </table:table-cell>
          <table:table-cell table:style-name="Table4.A1" office:value-type="string">
            <text:p text:style-name="Standard">Coordinates the complete grant application process</text:p>
          </table:table-cell>
        </table:table-row>
        <table:table-row table:style-name="Table4.1">
          <table:table-cell table:style-name="Table4.A1" office:value-type="string">
            <text:p text:style-name="Standard">ContactService</text:p>
          </table:table-cell>
          <table:table-cell table:style-name="Table4.A1" office:value-type="string">
            <text:p text:style-name="Standard">Creates or updates citizen information</text:p>
          </table:table-cell>
        </table:table-row>
        <table:table-row table:style-name="Table4.1">
          <table:table-cell table:style-name="Table4.A1" office:value-type="string">
            <text:p text:style-name="Standard">EligibilityService</text:p>
          </table:table-cell>
          <table:table-cell table:style-name="Table4.A1" office:value-type="string">
            <text:p text:style-name="Standard">Evaluates eligibility based on configurable business rules</text:p>
          </table:table-cell>
        </table:table-row>
        <table:table-row table:style-name="Table4.1">
          <table:table-cell table:style-name="Table4.A1" office:value-type="string">
            <text:p text:style-name="Standard">GrantCalculationService</text:p>
          </table:table-cell>
          <table:table-cell table:style-name="Table4.A1" office:value-type="string">
            <text:p text:style-name="Standard">Calculates payment schedule and redistribution logic</text:p>
          </table:table-cell>
        </table:table-row>
        <table:table-row table:style-name="Table4.1">
          <table:table-cell table:style-name="Table4.A1" office:value-type="string">
            <text:p text:style-name="Standard">VerificationService</text:p>
          </table:table-cell>
          <table:table-cell table:style-name="Table4.A1" office:value-type="string">
            <text:p text:style-name="Standard">Calls external citizen verification services</text:p>
          </table:table-cell>
        </table:table-row>
        <table:table-row table:style-name="Table4.1">
          <table:table-cell table:style-name="Table4.A1" office:value-type="string">
            <text:p text:style-name="Standard">NotificationService</text:p>
          </table:table-cell>
          <table:table-cell table:style-name="Table4.A1" office:value-type="string">
            <text:p text:style-name="Standard">Sends email notifications and platform events</text:p>
          </table:table-cell>
        </table:table-row>
        <table:table-row table:style-name="Table4.1">
          <table:table-cell table:style-name="Table4.A1" office:value-type="string">
            <text:p text:style-name="Standard">BulkUploadService</text:p>
          </table:table-cell>
          <table:table-cell table:style-name="Table4.A1" office:value-type="string">
            <text:p text:style-name="Standard">Processes CSV uploads using Batch Apex</text:p>
          </table:table-cell>
        </table:table-row>
        <table:table-row table:style-name="Table4.1">
          <table:table-cell table:style-name="Table4.A1" office:value-type="string">
            <text:p text:style-name="Standard">GrantOptionService</text:p>
          </table:table-cell>
          <table:table-cell table:style-name="Table4.A1" office:value-type="string">
            <text:p text:style-name="Standard">Retrieves configurable grant options from Custom Metadata</text:p>
          </table:table-cell>
        </table:table-row>
      </table:table>
      <text:p text:style-name="Standard"/>
      <text:p text:style-name="Standard"/>
      <text:p text:style-name="Heading_20_2"><text:bookmark text:name="_c6fv74il63pa"/></text:p>
      <text:p text:style-name="P116"><text:bookmark text:name="_l9ukxbaz2ujl"/>3.4 Application Flow</text:p>
      <text:p text:style-name="Standard"><draw:frame draw:style-name="fr1" draw:name="image9.png" text:anchor-type="as-char" svg:width="5.2898in" svg:height="8.4425in" draw:z-index="0"><draw:image xlink:href="Pictures/100000000000026B000003DDC66CA77714314601.png" xlink:type="simple" xlink:show="embed" xlink:actuate="onLoad" loext:mime-type="image/png"/></draw:frame></text:p>
      <text:p text:style-name="P113"><text:bookmark text:name="_lqjl43hne98c"/>3.5 Flow vs Apex Decision Matrix</text:p>
      <text:p text:style-name="P3">One of the key architectural decisions is determining whether a requirement should be implemented using Salesforce Flow or Apex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3">Requirement</text:span></text:p>
          </table:table-cell>
          <table:table-cell table:style-name="Table5.A1" office:value-type="string">
            <text:p text:style-name="P1"><text:span text:style-name="T3">Technology</text:span></text:p>
          </table:table-cell>
          <table:table-cell table:style-name="Table5.A1" office:value-type="string">
            <text:p text:style-name="P1"><text:span text:style-name="T3">Justification</text:span></text:p>
          </table:table-cell>
        </table:table-row>
        <table:table-row table:style-name="Table5.1">
          <table:table-cell table:style-name="Table5.A1" office:value-type="string">
            <text:p text:style-name="Standard">Email Notifications</text:p>
          </table:table-cell>
          <table:table-cell table:style-name="Table5.A1" office:value-type="string">
            <text:p text:style-name="Standard">Flow</text:p>
          </table:table-cell>
          <table:table-cell table:style-name="Table5.A1" office:value-type="string">
            <text:p text:style-name="Standard">Declarative, easy to maintain</text:p>
          </table:table-cell>
        </table:table-row>
        <table:table-row table:style-name="Table5.1">
          <table:table-cell table:style-name="Table5.A1" office:value-type="string">
            <text:p text:style-name="Standard">Assignment Rules</text:p>
          </table:table-cell>
          <table:table-cell table:style-name="Table5.A1" office:value-type="string">
            <text:p text:style-name="Standard">Flow</text:p>
          </table:table-cell>
          <table:table-cell table:style-name="Table5.A1" office:value-type="string">
            <text:p text:style-name="Standard">Administrator configurable</text:p>
          </table:table-cell>
        </table:table-row>
        <table:table-row table:style-name="Table5.1">
          <table:table-cell table:style-name="Table5.A1" office:value-type="string">
            <text:p text:style-name="Standard">Approval Process</text:p>
          </table:table-cell>
          <table:table-cell table:style-name="Table5.A1" office:value-type="string">
            <text:p text:style-name="Standard">Flow</text:p>
          </table:table-cell>
          <table:table-cell table:style-name="Table5.A1" office:value-type="string">
            <text:p text:style-name="Standard">Native Salesforce capability</text:p>
          </table:table-cell>
        </table:table-row>
        <table:table-row table:style-name="Table5.1">
          <table:table-cell table:style-name="Table5.A1" office:value-type="string">
            <text:p text:style-name="Standard">Grant Eligibility</text:p>
          </table:table-cell>
          <table:table-cell table:style-name="Table5.A1" office:value-type="string">
            <text:p text:style-name="Standard">Apex</text:p>
          </table:table-cell>
          <table:table-cell table:style-name="Table5.A1" office:value-type="string">
            <text:p text:style-name="Standard">Complex business rules</text:p>
          </table:table-cell>
        </table:table-row>
        <table:table-row table:style-name="Table5.1">
          <table:table-cell table:style-name="Table5.A1" office:value-type="string">
            <text:p text:style-name="Standard">Payment Redistribution</text:p>
          </table:table-cell>
          <table:table-cell table:style-name="Table5.A1" office:value-type="string">
            <text:p text:style-name="Standard">Apex</text:p>
          </table:table-cell>
          <table:table-cell table:style-name="Table5.A1" office:value-type="string">
            <text:p text:style-name="Standard">Performance-critical calculations</text:p>
          </table:table-cell>
        </table:table-row>
        <table:table-row table:style-name="Table5.1">
          <table:table-cell table:style-name="Table5.A1" office:value-type="string">
            <text:p text:style-name="Standard">REST Integration</text:p>
          </table:table-cell>
          <table:table-cell table:style-name="Table5.A1" office:value-type="string">
            <text:p text:style-name="Standard">Apex</text:p>
          </table:table-cell>
          <table:table-cell table:style-name="Table5.A1" office:value-type="string">
            <text:p text:style-name="Standard">HTTP callouts are required</text:p>
          </table:table-cell>
        </table:table-row>
        <table:table-row table:style-name="Table5.1">
          <table:table-cell table:style-name="Table5.A1" office:value-type="string">
            <text:p text:style-name="Standard">Bulk CSV Processing</text:p>
          </table:table-cell>
          <table:table-cell table:style-name="Table5.A1" office:value-type="string">
            <text:p text:style-name="Standard">Apex Batch</text:p>
          </table:table-cell>
          <table:table-cell table:style-name="Table5.A1" office:value-type="string">
            <text:p text:style-name="Standard">Large-volume processing</text:p>
          </table:table-cell>
        </table:table-row>
        <table:table-row table:style-name="Table5.1">
          <table:table-cell table:style-name="Table5.A1" office:value-type="string">
            <text:p text:style-name="Standard">Complex Validation</text:p>
          </table:table-cell>
          <table:table-cell table:style-name="Table5.A1" office:value-type="string">
            <text:p text:style-name="Standard">Apex</text:p>
          </table:table-cell>
          <table:table-cell table:style-name="Table5.A1" office:value-type="string">
            <text:p text:style-name="Standard">Cross-object validation</text:p>
          </table:table-cell>
        </table:table-row>
        <table:table-row table:style-name="Table5.1">
          <table:table-cell table:style-name="Table5.A1" office:value-type="string">
            <text:p text:style-name="Standard">Grant Option Retrieval</text:p>
          </table:table-cell>
          <table:table-cell table:style-name="Table5.A1" office:value-type="string">
            <text:p text:style-name="Standard">Custom Metadata + Apex</text:p>
          </table:table-cell>
          <table:table-cell table:style-name="Table5.A1" office:value-type="string">
            <text:p text:style-name="Standard">Configuration-driven solution</text:p>
          </table:table-cell>
        </table:table-row>
      </table:table>
      <text:p text:style-name="P112"><text:bookmark text:name="_dxv8gxntza8j"/>3.6 Why Apex Is Used Only When Necessary</text:p>
      <text:p text:style-name="P3">The solution intentionally minimizes custom code.</text:p>
      <text:p text:style-name="P3">Apex is implemented only when one or more of the following conditions are met:</text:p>
      <text:list xml:id="list207685423" text:style-name="WWNum28">
        <text:list-item>
          <text:p text:style-name="P13">Complex payload transformation.</text:p>
        </text:list-item>
        <text:list-item>
          <text:p text:style-name="P44">Performance-critical calculations.</text:p>
        </text:list-item>
        <text:list-item>
          <text:p text:style-name="P44">External REST integrations.</text:p>
        </text:list-item>
        <text:list-item>
          <text:p text:style-name="P44">Bulk data processing.</text:p>
        </text:list-item>
        <text:list-item>
          <text:p text:style-name="P44">Cross-object business validation.</text:p>
        </text:list-item>
        <text:list-item>
          <text:p text:style-name="P44">Reusable enterprise services.</text:p>
        </text:list-item>
        <text:list-item>
          <text:p text:style-name="P72"><text:soft-page-break/>Scenarios that cannot be implemented declaratively.</text:p>
        </text:list-item>
      </text:list>
      <text:p text:style-name="P3">All other business automation is implemented using Salesforce Flow to reduce maintenance costs and improve administrator productivity. This approach follows Salesforce's recommendation to favor declarative capabilities before introducing custom code.</text:p>
      <text:p text:style-name="P115"><text:bookmark text:name="_y5u25foqze2a"/>3.7 Service Interaction Diagram</text:p>
      <text:p text:style-name="Standard"><draw:frame draw:style-name="fr1" draw:name="image1.png" text:anchor-type="as-char" svg:width="6.5in" svg:height="2.9165in" draw:z-index="0"><draw:image xlink:href="Pictures/10000000000003F5000001C9AFAB057C9025E8C4.png" xlink:type="simple" xlink:show="embed" xlink:actuate="onLoad" loext:mime-type="image/png"/></draw:frame></text:p>
      <text:p text:style-name="Standard"/>
      <text:p text:style-name="P112"><text:bookmark text:name="_gbpqllvheiwh"/>3.8 Error Handling Strategy</text:p>
      <text:p text:style-name="P3">The application adopts a centralized error handling strategy.</text:p>
      <text:p text:style-name="P3"><draw:frame draw:style-name="fr1" draw:name="image4.png" text:anchor-type="as-char" svg:width="3.0681in" svg:height="3.3319in" draw:z-index="0"><draw:image xlink:href="Pictures/100000000000016D0000018FC2CAD5B656C1BB30.png" xlink:type="simple" xlink:show="embed" xlink:actuate="onLoad" loext:mime-type="image/png"/></draw:frame></text:p>
      <text:p text:style-name="P6">All exceptions are captured using a centralized exception framework.</text:p>
      <text:p text:style-name="P3">Unexpected exceptions are stored in a dedicated custom object (<text:span text:style-name="T5">Integration_Error__c</text:span> or <text:span text:style-name="T5">Application_Error__c</text:span>) together with the following information:</text:p>
      <text:list xml:id="list2295350270" text:style-name="WWNum12">
        <text:list-item>
          <text:p text:style-name="P14">Timestamp</text:p>
        </text:list-item>
        <text:list-item>
          <text:p text:style-name="P45">User</text:p>
        </text:list-item>
        <text:list-item>
          <text:p text:style-name="P45">Transaction ID</text:p>
        </text:list-item>
        <text:list-item>
          <text:p text:style-name="P45">Request Payload</text:p>
        </text:list-item>
        <text:list-item>
          <text:p text:style-name="P45">Response Payload</text:p>
        </text:list-item>
        <text:list-item>
          <text:p text:style-name="P45">Stack Trace</text:p>
        </text:list-item>
        <text:list-item>
          <text:p text:style-name="P45">Retry Count</text:p>
        </text:list-item>
        <text:list-item>
          <text:p text:style-name="P73">Processing Status</text:p>
        </text:list-item>
      </text:list>
      <text:p text:style-name="P3">This approach simplifies operational monitoring, troubleshooting, and future retry processing.</text:p>
      <text:p text:style-name="P3"/>
      <text:p text:style-name="P107"><text:bookmark text:name="_nswgedtp64g9"/>4. Architectural Decision Records (ADR)</text:p>
      <text:p text:style-name="Heading_20_2"><text:bookmark text:name="_una1lsyuxohg"/>4.1 Purpose</text:p>
      <text:p text:style-name="P3">Architectural Decision Records (ADR) document the significant architectural decisions made throughout the solution design process.</text:p>
      <text:p text:style-name="P3">Each decision captures the problem being addressed, the selected approach, alternative options considered, and the rationale behind the final decision.</text:p>
      <text:p text:style-name="P3">This provides transparency, improves maintainability, and supports future architectural evolution.</text:p>
      <text:p text:style-name="P3"/>
      <text:p text:style-name="P109"><text:bookmark text:name="_bpz0wuy4j7cj"/><text:span text:style-name="T3">ADR-001 — Introduce Grant Application as a Separate Transaction Object</text:span></text:p>
      <text:p text:style-name="P111"><text:bookmark text:name="_phg3lgnse8xj"/><text:span text:style-name="T6">Context</text:span></text:p>
      <text:p text:style-name="P3">The assessment requires storing citizen information in the Contact object and grant payment schedules in Grant Disbursement records.</text:p>
      <text:p text:style-name="P3">A design decision is required regarding whether all application-related information should be stored directly on Contact or separated into a dedicated transactional object.</text:p>
      <text:p text:style-name="P111"><text:bookmark text:name="_lg2fpp5x1b3n"/><text:span text:style-name="T6">Decision</text:span></text:p>
      <text:p text:style-name="P3">Introduce a custom object named <text:span text:style-name="T3">Grant_Application__c</text:span> between Contact and Grant_Disbursement__c.</text:p>
      <text:p text:style-name="P111"><text:bookmark text:name="_vcttumajlwva"/><text:span text:style-name="T6">Alternatives Considered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<text:span text:style-name="T3">Option</text:span></text:p>
          </table:table-cell>
          <table:table-cell table:style-name="Table6.A1" office:value-type="string">
            <text:p text:style-name="P4"><text:span text:style-name="T3">Description</text:span></text:p>
          </table:table-cell>
        </table:table-row>
        <table:table-row table:style-name="Table6.2">
          <table:table-cell table:style-name="Table6.A1" office:value-type="string">
            <text:p text:style-name="P3">Store all information directly in Contact</text:p>
          </table:table-cell>
          <table:table-cell table:style-name="Table6.A1" office:value-type="string">
            <text:p text:style-name="P3">Simpler implementation but mixes master and transactional data</text:p>
          </table:table-cell>
        </table:table-row>
        <table:table-row table:style-name="Table6.1">
          <table:table-cell table:style-name="Table6.A1" office:value-type="string">
            <text:p text:style-name="P3">Introduce Grant Application object</text:p>
          </table:table-cell>
          <table:table-cell table:style-name="Table6.A1" office:value-type="string">
            <text:p text:style-name="P3">Adds one object but provides a cleaner domain model</text:p>
          </table:table-cell>
        </table:table-row>
      </table:table>
      <text:p text:style-name="P111"><text:bookmark text:name="_jpljieir1vgs"/><text:span text:style-name="T6">Rationale</text:span></text:p>
      <text:p text:style-name="P3">Separating application data from citizen master data provides better normalization, preserves application history, supports multiple applications per citizen, improves reporting capabilities, and simplifies future enhancements.</text:p>
      <text:p text:style-name="P111"><text:bookmark text:name="_49w1dkuszulq"/><text:span text:style-name="T6">Consequences</text:span></text:p>
      <text:p text:style-name="P3">Positive:</text:p>
      <text:list xml:id="list57622050" text:style-name="WWNum20">
        <text:list-item>
          <text:p text:style-name="P15">Better scalability</text:p>
        </text:list-item>
        <text:list-item>
          <text:p text:style-name="P46"><text:soft-page-break/>Cleaner data model</text:p>
        </text:list-item>
        <text:list-item>
          <text:p text:style-name="P46">Easier maintenance</text:p>
        </text:list-item>
        <text:list-item>
          <text:p text:style-name="P74">Historical tracking</text:p>
        </text:list-item>
      </text:list>
      <text:p text:style-name="P3">Trade-off:</text:p>
      <text:list xml:id="list528549864" text:style-name="WWNum2">
        <text:list-item>
          <text:p text:style-name="P16">One additional custom object</text:p>
        </text:list-item>
        <text:list-item>
          <text:p text:style-name="P75">Slightly higher implementation complexity</text:p>
        </text:list-item>
      </text:list>
      <text:p text:style-name="P3"/>
      <text:p text:style-name="P109"><text:bookmark text:name="_vzp21kg0u2zg"/><text:span text:style-name="T3">ADR-002 — Flow First, Apex When Necessary</text:span></text:p>
      <text:p text:style-name="P111"><text:bookmark text:name="_zd0v32qhwa1u"/><text:span text:style-name="T6">Context</text:span></text:p>
      <text:p text:style-name="P3">Salesforce offers both declarative automation and programmatic development.</text:p>
      <text:p text:style-name="P3">A design decision is required regarding where business logic should be implemented.</text:p>
      <text:p text:style-name="P111"><text:bookmark text:name="_5abtcp8761cn"/><text:span text:style-name="T6">Decision</text:span></text:p>
      <text:p text:style-name="P3">Use Salesforce Flow for orchestration and Apex only for complex business logic.</text:p>
      <text:p text:style-name="P111"><text:bookmark text:name="_22cd99t18owd"/><text:span text:style-name="T6">Rationale</text:span></text:p>
      <text:p text:style-name="P3">Flow provides better maintainability for administrators and reduces long-term technical debt.</text:p>
      <text:p text:style-name="P3">Apex is reserved for scenarios requiring:</text:p>
      <text:list xml:id="list1942030792" text:style-name="WWNum30">
        <text:list-item>
          <text:p text:style-name="P17">Complex calculations</text:p>
        </text:list-item>
        <text:list-item>
          <text:p text:style-name="P47">External integrations</text:p>
        </text:list-item>
        <text:list-item>
          <text:p text:style-name="P47">Bulk processing</text:p>
        </text:list-item>
        <text:list-item>
          <text:p text:style-name="P47">Performance-critical algorithms</text:p>
        </text:list-item>
        <text:list-item>
          <text:p text:style-name="P76">Cross-object validation</text:p>
        </text:list-item>
      </text:list>
      <text:p text:style-name="P111"><text:bookmark text:name="_z57b3s76vtdx"/><text:soft-page-break/><text:span text:style-name="T6">Consequences</text:span></text:p>
      <text:p text:style-name="P3">Positive:</text:p>
      <text:list xml:id="list42698764" text:style-name="WWNum1">
        <text:list-item>
          <text:p text:style-name="P18">Easier administration</text:p>
        </text:list-item>
        <text:list-item>
          <text:p text:style-name="P48">Lower maintenance cost</text:p>
        </text:list-item>
        <text:list-item>
          <text:p text:style-name="P48">Reduced custom code</text:p>
        </text:list-item>
        <text:list-item>
          <text:p text:style-name="P77">Better alignment with Salesforce best practices</text:p>
        </text:list-item>
      </text:list>
      <text:p text:style-name="P3">Trade-off:</text:p>
      <text:list xml:id="list475554966" text:style-name="WWNum3">
        <text:list-item>
          <text:p text:style-name="P19">Logic is distributed between Flow and Apex</text:p>
        </text:list-item>
        <text:list-item>
          <text:p text:style-name="P78">Clear governance is required</text:p>
        </text:list-item>
      </text:list>
      <text:p text:style-name="P3"/>
      <text:p text:style-name="P109"><text:bookmark text:name="_1p8jav9stveu"/><text:span text:style-name="T3">ADR-003 — Configuration over Hardcoded Business Rules</text:span></text:p>
      <text:p text:style-name="P111"><text:bookmark text:name="_y4yte7zcmiog"/><text:span text:style-name="T6">Context</text:span></text:p>
      <text:p text:style-name="P3">The assessment explicitly states that administrators should be able to add new grant options without modifying source code.</text:p>
      <text:p text:style-name="P111"><text:bookmark text:name="_ev9gfp7m5l10"/><text:span text:style-name="T6">Decision</text:span></text:p>
      <text:p text:style-name="P3">Store grant configuration in <text:span text:style-name="T3">Custom Metadata Types</text:span>.</text:p>
      <text:p text:style-name="P111"><text:bookmark text:name="_scp03q94x8xz"/><text:span text:style-name="T6">Alternatives Considered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T3">Option</text:span></text:p>
          </table:table-cell>
          <table:table-cell table:style-name="Table7.A1" office:value-type="string">
            <text:p text:style-name="P4"><text:span text:style-name="T3">Description</text:span></text:p>
          </table:table-cell>
        </table:table-row>
        <table:table-row table:style-name="Table7.1">
          <table:table-cell table:style-name="Table7.A1" office:value-type="string">
            <text:p text:style-name="P3">Hardcoded Apex Constants</text:p>
          </table:table-cell>
          <table:table-cell table:style-name="Table7.A1" office:value-type="string">
            <text:p text:style-name="P3">Requires deployment for every business change</text:p>
          </table:table-cell>
        </table:table-row>
        <table:table-row table:style-name="Table7.1">
          <table:table-cell table:style-name="Table7.A1" office:value-type="string">
            <text:p text:style-name="P3">Custom Metadata Type</text:p>
          </table:table-cell>
          <table:table-cell table:style-name="Table7.A1" office:value-type="string">
            <text:p text:style-name="P3">Business configuration managed by administrators</text:p>
          </table:table-cell>
        </table:table-row>
      </table:table>
      <text:p text:style-name="P111"><text:bookmark text:name="_8nnhclu00utp"/><text:span text:style-name="T6">Rationale</text:span></text:p>
      <text:p text:style-name="P3">Business rules change more frequently than application logic.</text:p>
      <text:p text:style-name="P3"><text:soft-page-break/>Externalizing configuration enables administrators to manage grant options without requiring code deployment.</text:p>
      <text:p text:style-name="P111"><text:bookmark text:name="_8ymjyu85bf2o"/><text:span text:style-name="T6">Consequences</text:span></text:p>
      <text:p text:style-name="P3">Positive:</text:p>
      <text:list xml:id="list3051695514" text:style-name="WWNum29">
        <text:list-item>
          <text:p text:style-name="P20">No deployment required</text:p>
        </text:list-item>
        <text:list-item>
          <text:p text:style-name="P49">Better flexibility</text:p>
        </text:list-item>
        <text:list-item>
          <text:p text:style-name="P79">Easier administration</text:p>
        </text:list-item>
      </text:list>
      <text:p text:style-name="P3">Trade-off:</text:p>
      <text:list xml:id="list650129674" text:style-name="WWNum13">
        <text:list-item>
          <text:p text:style-name="P97">Slightly more complex initial implementation</text:p>
        </text:list-item>
      </text:list>
      <text:p text:style-name="P109"><text:bookmark text:name="_i85a2ufeggom"/><text:span text:style-name="T3">ADR-004 — Layered Service Architecture</text:span></text:p>
      <text:p text:style-name="P111"><text:bookmark text:name="_qplxw7olujw7"/><text:span text:style-name="T6">Context</text:span></text:p>
      <text:p text:style-name="P3">Business logic could be implemented directly inside controllers or triggers.</text:p>
      <text:p text:style-name="P111"><text:bookmark text:name="_krmjaqbfnty7"/><text:span text:style-name="T6">Decision</text:span></text:p>
      <text:p text:style-name="P3">Implement a dedicated Service Layer.</text:p>
      <text:p text:style-name="P111"><text:bookmark text:name="_jwwrhu5de1he"/><text:span text:style-name="T6">Rationale</text:span></text:p>
      <text:p text:style-name="P3">Each service has a single responsibility.</text:p>
      <text:p text:style-name="P3">Services are reusable across LWC, Flow, Batch Apex, Scheduled Apex, and REST APIs.</text:p>
      <text:p text:style-name="P111"><text:bookmark text:name="_w72n9xr79paa"/><text:span text:style-name="T6">Consequences</text:span></text:p>
      <text:p text:style-name="P3">Positive:</text:p>
      <text:list xml:id="list2147988547" text:style-name="WWNum37">
        <text:list-item>
          <text:p text:style-name="P21">High cohesion</text:p>
        </text:list-item>
        <text:list-item>
          <text:p text:style-name="P50">Loose coupling</text:p>
        </text:list-item>
        <text:list-item>
          <text:p text:style-name="P50">Easier unit testing</text:p>
        </text:list-item>
        <text:list-item>
          <text:p text:style-name="P80"><text:soft-page-break/>Better scalability</text:p>
        </text:list-item>
      </text:list>
      <text:p text:style-name="P3">Trade-off:</text:p>
      <text:list xml:id="list759004841" text:style-name="WWNum14">
        <text:list-item>
          <text:p text:style-name="P22">Additional classes</text:p>
        </text:list-item>
        <text:list-item>
          <text:p text:style-name="P81">Slightly more project structure</text:p>
        </text:list-item>
      </text:list>
      <text:p text:style-name="P3"/>
      <text:p text:style-name="P109"><text:bookmark text:name="_qva6m936pptv"/><text:span text:style-name="T3">ADR-005 — Trigger Handler Pattern</text:span></text:p>
      <text:p text:style-name="P111"><text:bookmark text:name="_gi2hv9ohlsom"/><text:span text:style-name="T6">Context</text:span></text:p>
      <text:p text:style-name="P3">Business logic can either be written directly inside triggers or delegated to handler classes.</text:p>
      <text:p text:style-name="P111"><text:bookmark text:name="_bncxq0zi5644"/><text:span text:style-name="T6">Decision</text:span></text:p>
      <text:p text:style-name="P3">Use a Trigger Handler framework.</text:p>
      <text:p text:style-name="P111"><text:bookmark text:name="_d8lbevvx16xz"/><text:span text:style-name="T6">Rationale</text:span></text:p>
      <text:p text:style-name="P3">Triggers should only dispatch events.</text:p>
      <text:p text:style-name="P3">Business logic belongs inside service classes.</text:p>
      <text:p text:style-name="P111"><text:bookmark text:name="_nlif866y6dwp"/><text:span text:style-name="T6">Consequences</text:span></text:p>
      <text:p text:style-name="P3">Positive:</text:p>
      <text:list xml:id="list3405030587" text:style-name="WWNum21">
        <text:list-item>
          <text:p text:style-name="P23">Cleaner triggers</text:p>
        </text:list-item>
        <text:list-item>
          <text:p text:style-name="P51">Reusable logic</text:p>
        </text:list-item>
        <text:list-item>
          <text:p text:style-name="P51">Easier testing</text:p>
        </text:list-item>
        <text:list-item>
          <text:p text:style-name="P82">Better governance</text:p>
        </text:list-item>
      </text:list>
      <text:p text:style-name="P3">Trade-off:</text:p>
      <text:list xml:id="list1463300077" text:style-name="WWNum36">
        <text:list-item>
          <text:p text:style-name="P98">More Apex classes</text:p>
        </text:list-item>
      </text:list>
      <text:p text:style-name="P3"><text:soft-page-break/></text:p>
      <text:p text:style-name="P117"><text:bookmark text:name="_95757fdp8kg9"/></text:p>
      <text:p text:style-name="P110"><text:bookmark text:name="_vamkmkwfqhak"/><text:span text:style-name="T3">ADR-006 — Named Credentials for External Integration</text:span></text:p>
      <text:p text:style-name="P111"><text:bookmark text:name="_a1b69obhq9at"/><text:span text:style-name="T6">Context</text:span></text:p>
      <text:p text:style-name="P3">Citizen verification requires communication with an external Master Data Management system.</text:p>
      <text:p text:style-name="P111"><text:bookmark text:name="_pumrc6753yui"/><text:span text:style-name="T6">Decision</text:span></text:p>
      <text:p text:style-name="P3">Use Named Credentials together with External Credentials.</text:p>
      <text:p text:style-name="P111"><text:bookmark text:name="_kauua1ge6vvm"/><text:span text:style-name="T6">Alternatives Considered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<text:span text:style-name="T3">Option</text:span></text:p>
          </table:table-cell>
          <table:table-cell table:style-name="Table8.A1" office:value-type="string">
            <text:p text:style-name="P4"><text:span text:style-name="T3">Description</text:span></text:p>
          </table:table-cell>
        </table:table-row>
        <table:table-row table:style-name="Table8.1">
          <table:table-cell table:style-name="Table8.A1" office:value-type="string">
            <text:p text:style-name="P3">Hardcoded endpoint and credentials</text:p>
          </table:table-cell>
          <table:table-cell table:style-name="Table8.A1" office:value-type="string">
            <text:p text:style-name="P3">Security risk</text:p>
          </table:table-cell>
        </table:table-row>
        <table:table-row table:style-name="Table8.1">
          <table:table-cell table:style-name="Table8.A1" office:value-type="string">
            <text:p text:style-name="P3">Named Credentials</text:p>
          </table:table-cell>
          <table:table-cell table:style-name="Table8.A1" office:value-type="string">
            <text:p text:style-name="P3">Secure and maintainable</text:p>
          </table:table-cell>
        </table:table-row>
      </table:table>
      <text:p text:style-name="P111"><text:bookmark text:name="_9ontyo2u3h1j"/><text:span text:style-name="T6">Rationale</text:span></text:p>
      <text:p text:style-name="P3">Authentication details are managed outside application code.</text:p>
      <text:p text:style-name="P3">Credentials can be rotated without modifying Apex.</text:p>
      <text:p text:style-name="P111"><text:bookmark text:name="_fxb76vw7hp5v"/><text:span text:style-name="T6">Consequences</text:span></text:p>
      <text:p text:style-name="P3">Positive:</text:p>
      <text:list xml:id="list2768207152" text:style-name="WWNum7">
        <text:list-item>
          <text:p text:style-name="P24">Improved security</text:p>
        </text:list-item>
        <text:list-item>
          <text:p text:style-name="P52">Easier credential rotation</text:p>
        </text:list-item>
        <text:list-item>
          <text:p text:style-name="P83">Cleaner Apex code</text:p>
        </text:list-item>
      </text:list>
      <text:p text:style-name="P3">Trade-off:</text:p>
      <text:list xml:id="list3117783650" text:style-name="WWNum35">
        <text:list-item>
          <text:p text:style-name="P99">Additional Salesforce configuration</text:p>
        </text:list-item>
      </text:list>
      <text:p text:style-name="P3"/>
      <text:p text:style-name="P117"><text:bookmark text:name="_7xs51mre7br0"/></text:p>
      <text:p text:style-name="P110"><text:bookmark text:name="_y59xg77o4ucd"/><text:span text:style-name="T3">ADR-007 — Centralized Error Logging</text:span></text:p>
      <text:p text:style-name="P111"><text:bookmark text:name="_4k7to4day5wm"/><text:span text:style-name="T6">Context</text:span></text:p>
      <text:p text:style-name="P3">External integrations and batch processing may fail unexpectedly.</text:p>
      <text:p text:style-name="P111"><text:bookmark text:name="_1bhzggmq869v"/><text:span text:style-name="T6">Decision</text:span></text:p>
      <text:p text:style-name="P3">Persist unexpected exceptions into a dedicated custom object.</text:p>
      <text:p text:style-name="P3">Suggested object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4"><text:span text:style-name="T3">Application_Error__c</text:span></text:p>
            <text:p text:style-name="P104">or</text:p>
            <text:p text:style-name="P104"><text:span text:style-name="T3">Integration_Error__c</text:span></text:p>
          </table:table-cell>
        </table:table-row>
      </table:table>
      <text:p text:style-name="P111"><text:bookmark text:name="_6gwbq9clesnt"/><text:span text:style-name="T6">Stored Information</text:span></text:p>
      <text:list xml:id="list1125475738" text:style-name="WWNum23">
        <text:list-item>
          <text:p text:style-name="P25">Timestamp</text:p>
        </text:list-item>
        <text:list-item>
          <text:p text:style-name="P53">User</text:p>
        </text:list-item>
        <text:list-item>
          <text:p text:style-name="P53">Transaction Id</text:p>
        </text:list-item>
        <text:list-item>
          <text:p text:style-name="P53">Error Code</text:p>
        </text:list-item>
        <text:list-item>
          <text:p text:style-name="P53">Error Message</text:p>
        </text:list-item>
        <text:list-item>
          <text:p text:style-name="P53">Stack Trace</text:p>
        </text:list-item>
        <text:list-item>
          <text:p text:style-name="P53">Request Payload</text:p>
        </text:list-item>
        <text:list-item>
          <text:p text:style-name="P53">Response Payload</text:p>
        </text:list-item>
        <text:list-item>
          <text:p text:style-name="P53">Retry Count</text:p>
        </text:list-item>
        <text:list-item>
          <text:p text:style-name="P84">Processing Status</text:p>
        </text:list-item>
      </text:list>
      <text:p text:style-name="P111"><text:bookmark text:name="_rngn93z1165p"/><text:span text:style-name="T6">Rationale</text:span></text:p>
      <text:p text:style-name="P3">Centralized logging simplifies production support and enables retry mechanisms.</text:p>
      <text:p text:style-name="P111"><text:bookmark text:name="_rxdyvcbrh5j7"/><text:span text:style-name="T6">Consequences</text:span></text:p>
      <text:p text:style-name="P3"><text:soft-page-break/>Positive:</text:p>
      <text:list xml:id="list809032688" text:style-name="WWNum33">
        <text:list-item>
          <text:p text:style-name="P26">Easier troubleshooting</text:p>
        </text:list-item>
        <text:list-item>
          <text:p text:style-name="P54">Operational monitoring</text:p>
        </text:list-item>
        <text:list-item>
          <text:p text:style-name="P54">Retry capability</text:p>
        </text:list-item>
        <text:list-item>
          <text:p text:style-name="P85">Audit history</text:p>
        </text:list-item>
      </text:list>
      <text:p text:style-name="P3">Trade-off:</text:p>
      <text:list xml:id="list3207194922" text:style-name="WWNum32">
        <text:list-item>
          <text:p text:style-name="P100">Additional storage consumption</text:p>
        </text:list-item>
      </text:list>
      <text:p text:style-name="P3"/>
      <text:p text:style-name="P109"><text:bookmark text:name="_v0j0crytybli"/><text:span text:style-name="T3">ADR-008 — Batch Apex for Bulk Processing</text:span></text:p>
      <text:p text:style-name="P111"><text:bookmark text:name="_sfl7mrxzp198"/><text:span text:style-name="T6">Context</text:span></text:p>
      <text:p text:style-name="P3">The assessment requires processing bulk CSV uploads.</text:p>
      <text:p text:style-name="P111"><text:bookmark text:name="_ybv1mh6nxc0c"/><text:span text:style-name="T6">Decision</text:span></text:p>
      <text:p text:style-name="P3">Use Batch Apex rather than synchronous processing.</text:p>
      <text:p text:style-name="P111"><text:bookmark text:name="_yjcu24f9dmr4"/><text:span text:style-name="T6">Rationale</text:span></text:p>
      <text:p text:style-name="P3">Batch Apex provides better governor limit management, fault isolation, and scalability.</text:p>
      <text:p text:style-name="P111"><text:bookmark text:name="_1wasvoq2ipoz"/><text:span text:style-name="T6">Consequences</text:span></text:p>
      <text:p text:style-name="P3">Positive:</text:p>
      <text:list xml:id="list3150624827" text:style-name="WWNum38">
        <text:list-item>
          <text:p text:style-name="P27">Handles large datasets</text:p>
        </text:list-item>
        <text:list-item>
          <text:p text:style-name="P55">Better resilience</text:p>
        </text:list-item>
        <text:list-item>
          <text:p text:style-name="P86">Supports partial retries</text:p>
        </text:list-item>
      </text:list>
      <text:p text:style-name="P3">Trade-off:</text:p>
      <text:list xml:id="list2540779964" text:style-name="WWNum26">
        <text:list-item>
          <text:p text:style-name="P101"><text:soft-page-break/>Slightly higher implementation complexity</text:p>
        </text:list-item>
      </text:list>
      <text:p text:style-name="P3"/>
      <text:p text:style-name="P3"/>
      <text:p text:style-name="P109"><text:bookmark text:name="_rx35605w8hqn"/><text:span text:style-name="T3">ADR-009 — Enterprise Security Model</text:span></text:p>
      <text:p text:style-name="P111"><text:bookmark text:name="_l7mf29ncujnk"/><text:span text:style-name="T6">Context</text:span></text:p>
      <text:p text:style-name="P3">The solution contains multiple user personas including Citizens, Support Agents, Supervisors, and Administrators.</text:p>
      <text:p text:style-name="P111"><text:bookmark text:name="_6w4rrv8ahbvg"/><text:span text:style-name="T6">Decision</text:span></text:p>
      <text:p text:style-name="P3">Implement Salesforce's layered security model.</text:p>
      <text:p text:style-name="P111"><text:bookmark text:name="_988bqwj5fo0l"/><text:span text:style-name="T6">Components</text:span></text:p>
      <text:list xml:id="list262370744" text:style-name="WWNum4">
        <text:list-item>
          <text:p text:style-name="P28">Organization-Wide Defaults (OWD)</text:p>
        </text:list-item>
        <text:list-item>
          <text:p text:style-name="P56">Role Hierarchy</text:p>
        </text:list-item>
        <text:list-item>
          <text:p text:style-name="P56">Sharing Rules</text:p>
        </text:list-item>
        <text:list-item>
          <text:p text:style-name="P56">Permission Sets</text:p>
        </text:list-item>
        <text:list-item>
          <text:p text:style-name="P56">Experience Cloud Profiles</text:p>
        </text:list-item>
        <text:list-item>
          <text:p text:style-name="P56">Field-Level Security</text:p>
        </text:list-item>
        <text:list-item>
          <text:p text:style-name="P87">Named Credentials</text:p>
        </text:list-item>
      </text:list>
      <text:p text:style-name="P111"><text:bookmark text:name="_g5ooov5ifm35"/><text:span text:style-name="T6">Rationale</text:span></text:p>
      <text:p text:style-name="P3">Each layer addresses a different security concern, providing defense in depth.</text:p>
      <text:p text:style-name="P111"><text:bookmark text:name="_ndl7tx3ymvk4"/><text:span text:style-name="T6">Consequences</text:span></text:p>
      <text:p text:style-name="P3">Positive:</text:p>
      <text:list xml:id="list2549574766" text:style-name="WWNum5">
        <text:list-item>
          <text:p text:style-name="P29">Least privilege access</text:p>
        </text:list-item>
        <text:list-item>
          <text:p text:style-name="P57"><text:soft-page-break/>Regulatory compliance</text:p>
        </text:list-item>
        <text:list-item>
          <text:p text:style-name="P88">Simplified security governance</text:p>
        </text:list-item>
      </text:list>
      <text:p text:style-name="P3">Trade-off:</text:p>
      <text:list xml:id="list1598490455" text:style-name="WWNum15">
        <text:list-item>
          <text:p text:style-name="P102">Additional configuration effort</text:p>
        </text:list-item>
      </text:list>
      <text:p text:style-name="P3"/>
      <text:p text:style-name="P3"/>
      <text:p text:style-name="P109"><text:bookmark text:name="_jrpdh79u7ai"/><text:span text:style-name="T3">ADR-010 — Salesforce Files Instead of Legacy Attachments</text:span></text:p>
      <text:p text:style-name="P111"><text:bookmark text:name="_lzuce26l2t29"/><text:span text:style-name="T6">Context</text:span></text:p>
      <text:p text:style-name="P3">The assessment requires applicants to upload supporting documents.</text:p>
      <text:p text:style-name="P111"><text:bookmark text:name="_of8jwvqp9ark"/><text:span text:style-name="T6">Decision</text:span></text:p>
      <text:p text:style-name="P3">Store uploaded documents using Salesforce Files (<text:span text:style-name="T5">ContentVersion</text:span>, <text:span text:style-name="T5">ContentDocument</text:span>, and <text:span text:style-name="T5">ContentDocumentLink</text:span>).</text:p>
      <text:p text:style-name="P111"><text:bookmark text:name="_m7g1p7izwwnj"/><text:span text:style-name="T6">Alternatives Considered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<text:span text:style-name="T3">Option</text:span></text:p>
          </table:table-cell>
          <table:table-cell table:style-name="Table10.A1" office:value-type="string">
            <text:p text:style-name="P4"><text:span text:style-name="T3">Description</text:span></text:p>
          </table:table-cell>
        </table:table-row>
        <table:table-row table:style-name="Table10.1">
          <table:table-cell table:style-name="Table10.A1" office:value-type="string">
            <text:p text:style-name="P3">Attachment</text:p>
          </table:table-cell>
          <table:table-cell table:style-name="Table10.A1" office:value-type="string">
            <text:p text:style-name="P3">Legacy feature with limited capabilities</text:p>
          </table:table-cell>
        </table:table-row>
        <table:table-row table:style-name="Table10.1">
          <table:table-cell table:style-name="Table10.A1" office:value-type="string">
            <text:p text:style-name="P3">Salesforce Files</text:p>
          </table:table-cell>
          <table:table-cell table:style-name="Table10.A1" office:value-type="string">
            <text:p text:style-name="P3">Modern file management model</text:p>
          </table:table-cell>
        </table:table-row>
      </table:table>
      <text:p text:style-name="P111"><text:bookmark text:name="_rrswurhr2a3"/><text:span text:style-name="T6">Rationale</text:span></text:p>
      <text:p text:style-name="P3">Salesforce Files supports versioning, sharing, preview, and future integrations while aligning with Salesforce's strategic direction.</text:p>
      <text:p text:style-name="P111"><text:bookmark text:name="_6qzvkj8u806k"/><text:span text:style-name="T6">Consequences</text:span></text:p>
      <text:p text:style-name="P3">Positive:</text:p>
      <text:list xml:id="list1190119884" text:style-name="WWNum8">
        <text:list-item>
          <text:p text:style-name="P30">Modern architecture</text:p>
        </text:list-item>
        <text:list-item>
          <text:p text:style-name="P58">Better file lifecycle management</text:p>
        </text:list-item>
        <text:list-item>
          <text:p text:style-name="P89"><text:soft-page-break/>Native sharing and version control</text:p>
        </text:list-item>
      </text:list>
      <text:p text:style-name="P3">Trade-off:</text:p>
      <text:list xml:id="list3027312874" text:style-name="WWNum27">
        <text:list-item>
          <text:p text:style-name="P103">Slightly more complex data model compared to legacy attachments</text:p>
        </text:list-item>
      </text:list>
      <text:p text:style-name="P3"/>
      <text:p text:style-name="Heading_20_2"><text:bookmark text:name="_u4j8ef7mn0oi"/>4.2 ADR Summary</text:p>
      <text:p text:style-name="P3">The proposed architecture intentionally prioritizes maintainability, scalability, configurability, and operational excellence over short-term implementation simplicity. Each architectural decision has been evaluated based on long-term business value, Salesforce platform best practices, and enterprise application design principles. The result is a solution that not only satisfies the current assessment requirements but is also prepared to support future enhancements with minimal architectural rework.</text:p>
      <text:p text:style-name="P3"/>
      <text:p text:style-name="Heading_20_1"><text:bookmark text:name="_f3jf06g8m7iy"/>5. Non-Functional Requirements</text:p>
      <text:p text:style-name="Heading_20_2"><text:bookmark text:name="_8xm8pen1c23s"/>5.1 Overview</text:p>
      <text:p text:style-name="P3">In addition to satisfying the functional requirements, the proposed solution is designed to meet key non-functional requirements related to performance, scalability, security, maintainability, reliability, and operational excellence.</text:p>
      <text:p text:style-name="P3">These architectural considerations ensure that the solution remains sustainable throughout its lifecycle while supporting future business growth.</text:p>
      <text:p text:style-name="Heading_20_2"><text:bookmark text:name="_s9oom0bsvj03"/>5.2 Performance</text:p>
      <text:p text:style-name="P3">The application is designed to minimize server processing time and optimize the use of Salesforce platform resources.</text:p>
      <text:p text:style-name="Heading_20_3"><text:bookmark text:name="_grlgrfp4c9gi"/>Design Considerations</text:p>
      <text:list xml:id="list1739385198" text:style-name="WWNum6">
        <text:list-item>
          <text:p text:style-name="P31">Client-side validation is implemented using Lightning Web Components to reduce unnecessary server round trips.</text:p>
        </text:list-item>
        <text:list-item>
          <text:p text:style-name="P59">Business logic is bulkified to efficiently process multiple records within Salesforce governor limits.</text:p>
        </text:list-item>
        <text:list-item>
          <text:p text:style-name="P59">SOQL and DML operations are optimized to prevent excessive database operations.</text:p>
        </text:list-item>
        <text:list-item>
          <text:p text:style-name="P59">Collections (List, Set, and Map) are used to eliminate nested loops and reduce processing time.</text:p>
        </text:list-item>
        <text:list-item>
          <text:p text:style-name="P59">Long-running processes are executed asynchronously using Queueable Apex or Batch Apex where appropriate.</text:p>
        </text:list-item>
        <text:list-item>
          <text:p text:style-name="P90">External REST integrations are executed only when required to minimize network latency.</text:p>
        </text:list-item>
      </text:list>
      <text:p text:style-name="Heading_20_2"><text:bookmark text:name="_pxcdw2ja55od"/>5.3 Scalability</text:p>
      <text:p text:style-name="P3"><text:soft-page-break/>The architecture supports future business growth without requiring major structural changes.</text:p>
      <text:p text:style-name="Heading_20_3"><text:bookmark text:name="_comp4awff4du"/>Design Considerations</text:p>
      <text:list xml:id="list192184726" text:style-name="WWNum19">
        <text:list-item>
          <text:p text:style-name="P32">Separation between master data and transactional data.</text:p>
        </text:list-item>
        <text:list-item>
          <text:p text:style-name="P60">Configuration-driven business rules using Custom Metadata Types.</text:p>
        </text:list-item>
        <text:list-item>
          <text:p text:style-name="P60">Reusable Apex service classes.</text:p>
        </text:list-item>
        <text:list-item>
          <text:p text:style-name="P60">Layered application architecture.</text:p>
        </text:list-item>
        <text:list-item>
          <text:p text:style-name="P60">Batch processing for large-volume imports.</text:p>
        </text:list-item>
        <text:list-item>
          <text:p text:style-name="P91">Support for additional grant programs without changing application logic.</text:p>
        </text:list-item>
      </text:list>
      <text:p text:style-name="P3">The proposed design allows new grant schemes, eligibility rules, and business configurations to be introduced through metadata rather than source code modifications.</text:p>
      <text:p text:style-name="Heading_20_2"><text:bookmark text:name="_9u39o86s64o3"/>5.4 Security</text:p>
      <text:p text:style-name="P3">Security follows Salesforce's defense-in-depth approach.</text:p>
      <text:p text:style-name="Heading_20_3"><text:bookmark text:name="_qdjf98mqghg0"/>Security Controls</text:p>
      <text:list xml:id="list6016144" text:style-name="WWNum25">
        <text:list-item>
          <text:p text:style-name="P33">Organization-Wide Defaults</text:p>
        </text:list-item>
        <text:list-item>
          <text:p text:style-name="P61">Role Hierarchy</text:p>
        </text:list-item>
        <text:list-item>
          <text:p text:style-name="P61">Sharing Rules</text:p>
        </text:list-item>
        <text:list-item>
          <text:p text:style-name="P61">Permission Sets</text:p>
        </text:list-item>
        <text:list-item>
          <text:p text:style-name="P61">Field-Level Security</text:p>
        </text:list-item>
        <text:list-item>
          <text:p text:style-name="P61">Experience Cloud Profiles</text:p>
        </text:list-item>
        <text:list-item>
          <text:p text:style-name="P61">Named Credentials</text:p>
        </text:list-item>
        <text:list-item>
          <text:p text:style-name="P61">Secure REST authentication</text:p>
        </text:list-item>
        <text:list-item>
          <text:p text:style-name="P92">Platform Encryption (Future Enhancement)</text:p>
        </text:list-item>
      </text:list>
      <text:p text:style-name="P3"><text:soft-page-break/>Sensitive information is protected using Salesforce security mechanisms while external credentials remain outside application code.</text:p>
      <text:p text:style-name="Heading_20_2"><text:bookmark text:name="_ttz9gpy3cdsx"/>5.5 Availability</text:p>
      <text:p text:style-name="P3">The solution is designed for high availability by leveraging Salesforce Platform services.</text:p>
      <text:p text:style-name="P3">External dependencies are isolated through REST integration layers.</text:p>
      <text:p text:style-name="P3">Temporary failures from external systems do not impact overall platform availability and are handled through centralized exception management and retry mechanisms.</text:p>
      <text:p text:style-name="Heading_20_2"><text:bookmark text:name="_edvxj2nnc1q2"/>5.6 Reliability</text:p>
      <text:p text:style-name="P3">The application incorporates several reliability mechanisms.</text:p>
      <text:list xml:id="list282640956" text:style-name="WWNum18">
        <text:list-item>
          <text:p text:style-name="P34">Centralized exception handling</text:p>
        </text:list-item>
        <text:list-item>
          <text:p text:style-name="P62">Retry mechanism for integration failures</text:p>
        </text:list-item>
        <text:list-item>
          <text:p text:style-name="P62">Transaction rollback</text:p>
        </text:list-item>
        <text:list-item>
          <text:p text:style-name="P62">Validation before persistence</text:p>
        </text:list-item>
        <text:list-item>
          <text:p text:style-name="P62">Error logging</text:p>
        </text:list-item>
        <text:list-item>
          <text:p text:style-name="P93">Batch isolation for bulk processing</text:p>
        </text:list-item>
      </text:list>
      <text:p text:style-name="P3">These mechanisms improve operational stability and simplify production support.</text:p>
      <text:p text:style-name="Heading_20_2"><text:bookmark text:name="_3e5z86mtqbev"/>5.7 Maintainability</text:p>
      <text:p text:style-name="P3">Maintainability is achieved through clear separation of responsibilities.</text:p>
      <text:p text:style-name="P3">Presentation, orchestration, business logic, persistence, and integration are implemented independently.</text:p>
      <text:p text:style-name="P3">Configuration is externalized into Custom Metadata whenever possible.</text:p>
      <text:p text:style-name="P3">Simple automation uses Flow while complex reusable logic is implemented in Apex.</text:p>
      <text:p text:style-name="P3">This minimizes technical debt while improving long-term maintainability.</text:p>
      <text:p text:style-name="Heading_20_2"><text:bookmark text:name="_95nadx5mt8jd"/>5.8 Extensibility</text:p>
      <text:p text:style-name="P3"><text:soft-page-break/>The architecture is intentionally designed to support future enhancements.</text:p>
      <text:p text:style-name="P3">Examples include:</text:p>
      <text:list xml:id="list4036021897" text:style-name="WWNum16">
        <text:list-item>
          <text:p text:style-name="P35">Additional grant schemes</text:p>
        </text:list-item>
        <text:list-item>
          <text:p text:style-name="P63">New eligibility rules</text:p>
        </text:list-item>
        <text:list-item>
          <text:p text:style-name="P63">Multiple payment providers</text:p>
        </text:list-item>
        <text:list-item>
          <text:p text:style-name="P63">Additional external integrations</text:p>
        </text:list-item>
        <text:list-item>
          <text:p text:style-name="P63">Mobile applications</text:p>
        </text:list-item>
        <text:list-item>
          <text:p text:style-name="P63">AI-assisted citizen support</text:p>
        </text:list-item>
        <text:list-item>
          <text:p text:style-name="P94">Government reporting platforms</text:p>
        </text:list-item>
      </text:list>
      <text:p text:style-name="P3">These enhancements can be introduced with minimal impact on the existing architecture.</text:p>
      <text:p text:style-name="Heading_20_1"><text:bookmark text:name="_43sdr33q13mg"/></text:p>
      <text:p text:style-name="P107"><text:bookmark text:name="_up42hzs0w1ze"/>6. Assumptions and Constraints</text:p>
      <text:p text:style-name="Heading_20_2"><text:bookmark text:name="_t1hl5bm6mfp3"/>6.1 Assumptions</text:p>
      <text:p text:style-name="P3">The following assumptions have been made during the solution design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<text:span text:style-name="T3">ID</text:span></text:p>
          </table:table-cell>
          <table:table-cell table:style-name="Table11.A1" office:value-type="string">
            <text:p text:style-name="P4"><text:span text:style-name="T3">Assumption</text:span></text:p>
          </table:table-cell>
        </table:table-row>
        <table:table-row table:style-name="Table11.2">
          <table:table-cell table:style-name="Table11.A1" office:value-type="string">
            <text:p text:style-name="P3">A-01</text:p>
          </table:table-cell>
          <table:table-cell table:style-name="Table11.A1" office:value-type="string">
            <text:p text:style-name="P3">The Master Data Management (MDM) system exposes secure REST APIs for citizen verification.</text:p>
          </table:table-cell>
        </table:table-row>
        <table:table-row table:style-name="Table11.2">
          <table:table-cell table:style-name="Table11.A1" office:value-type="string">
            <text:p text:style-name="P3">A-02</text:p>
          </table:table-cell>
          <table:table-cell table:style-name="Table11.A1" office:value-type="string">
            <text:p text:style-name="P3">Each citizen can be uniquely identified using a government-issued identifier.</text:p>
          </table:table-cell>
        </table:table-row>
        <table:table-row table:style-name="Table11.2">
          <table:table-cell table:style-name="Table11.A1" office:value-type="string">
            <text:p text:style-name="P3">A-03</text:p>
          </table:table-cell>
          <table:table-cell table:style-name="Table11.A1" office:value-type="string">
            <text:p text:style-name="P3">Authentication for Experience Cloud users is managed through the organization's identity provider.</text:p>
          </table:table-cell>
        </table:table-row>
        <table:table-row table:style-name="Table11.2">
          <table:table-cell table:style-name="Table11.A1" office:value-type="string">
            <text:p text:style-name="P3">A-04</text:p>
          </table:table-cell>
          <table:table-cell table:style-name="Table11.A1" office:value-type="string">
            <text:p text:style-name="P3">Grant eligibility criteria are maintained by business administrators.</text:p>
          </table:table-cell>
        </table:table-row>
        <table:table-row table:style-name="Table11.2">
          <table:table-cell table:style-name="Table11.A1" office:value-type="string">
            <text:p text:style-name="P3">A-05</text:p>
          </table:table-cell>
          <table:table-cell table:style-name="Table11.A1" office:value-type="string">
            <text:p text:style-name="P3">Grant payment execution is performed by an external financial system.</text:p>
          </table:table-cell>
        </table:table-row>
        <table:table-row table:style-name="Table11.2">
          <table:table-cell table:style-name="Table11.A1" office:value-type="string">
            <text:p text:style-name="P3">A-06</text:p>
          </table:table-cell>
          <table:table-cell table:style-name="Table11.A1" office:value-type="string">
            <text:p text:style-name="P3">Business administrators are responsible for maintaining Custom Metadata records.</text:p>
          </table:table-cell>
        </table:table-row>
        <table:table-row table:style-name="Table11.2">
          <table:table-cell table:style-name="Table11.A1" office:value-type="string">
            <text:p text:style-name="P3">A-07</text:p>
          </table:table-cell>
          <table:table-cell table:style-name="Table11.A1" office:value-type="string">
            <text:p text:style-name="P3">Uploaded files comply with Salesforce storage limitations.</text:p>
          </table:table-cell>
        </table:table-row>
        <table:table-row table:style-name="Table11.2">
          <table:table-cell table:style-name="Table11.A1" office:value-type="string">
            <text:p text:style-name="P3">A-08</text:p>
          </table:table-cell>
          <table:table-cell table:style-name="Table11.A1" office:value-type="string">
            <text:p text:style-name="P3">External services provide acceptable response times for synchronous verification.</text:p>
          </table:table-cell>
        </table:table-row>
      </table:table>
      <text:p text:style-name="Heading_20_2"><text:bookmark text:name="_v8idrpld0oy0"/></text:p>
      <text:p text:style-name="P116"><text:bookmark text:name="_s6dsecwi5ujz"/>6.2 Constraints</text:p>
      <text:p text:style-name="P3">The following technical constraints apply to the proposed solution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"><text:span text:style-name="T3">ID</text:span></text:p>
          </table:table-cell>
          <table:table-cell table:style-name="Table12.A1" office:value-type="string">
            <text:p text:style-name="P4"><text:span text:style-name="T3">Constraint</text:span></text:p>
          </table:table-cell>
        </table:table-row>
        <table:table-row table:style-name="Table12.1">
          <table:table-cell table:style-name="Table12.A1" office:value-type="string">
            <text:p text:style-name="P3">C-01</text:p>
          </table:table-cell>
          <table:table-cell table:style-name="Table12.A1" office:value-type="string">
            <text:p text:style-name="P3">Salesforce governor limits apply to all Apex transactions.</text:p>
          </table:table-cell>
        </table:table-row>
        <table:table-row table:style-name="Table12.1">
          <table:table-cell table:style-name="Table12.A1" office:value-type="string">
            <text:p text:style-name="P3">C-02</text:p>
          </table:table-cell>
          <table:table-cell table:style-name="Table12.A1" office:value-type="string">
            <text:p text:style-name="P3">REST integrations depend on external system availability.</text:p>
          </table:table-cell>
        </table:table-row>
        <table:table-row table:style-name="Table12.1">
          <table:table-cell table:style-name="Table12.A1" office:value-type="string">
            <text:p text:style-name="P3">C-03</text:p>
          </table:table-cell>
          <table:table-cell table:style-name="Table12.A1" office:value-type="string">
            <text:p text:style-name="P3">File storage capacity is governed by Salesforce platform limits.</text:p>
          </table:table-cell>
        </table:table-row>
        <table:table-row table:style-name="Table12.1">
          <table:table-cell table:style-name="Table12.A1" office:value-type="string">
            <text:p text:style-name="P3">C-04</text:p>
          </table:table-cell>
          <table:table-cell table:style-name="Table12.A1" office:value-type="string">
            <text:p text:style-name="P3">Network latency may impact external API response time.</text:p>
          </table:table-cell>
        </table:table-row>
        <table:table-row table:style-name="Table12.1">
          <table:table-cell table:style-name="Table12.A1" office:value-type="string">
            <text:p text:style-name="P3">C-05</text:p>
          </table:table-cell>
          <table:table-cell table:style-name="Table12.A1" office:value-type="string">
            <text:p text:style-name="P3">Batch Apex execution follows Salesforce asynchronous processing limits.</text:p>
          </table:table-cell>
        </table:table-row>
        <table:table-row table:style-name="Table12.1">
          <table:table-cell table:style-name="Table12.A1" office:value-type="string">
            <text:p text:style-name="P3">C-06</text:p>
          </table:table-cell>
          <table:table-cell table:style-name="Table12.A1" office:value-type="string">
            <text:p text:style-name="P3">Platform upgrades and releases follow Salesforce release schedules.</text:p>
          </table:table-cell>
        </table:table-row>
        <table:table-row table:style-name="Table12.1">
          <table:table-cell table:style-name="Table12.A1" office:value-type="string">
            <text:p text:style-name="P3">C-07</text:p>
          </table:table-cell>
          <table:table-cell table:style-name="Table12.A1" office:value-type="string">
            <text:p text:style-name="P3">The assessment excludes implementation of payment gateway functionality.</text:p>
          </table:table-cell>
        </table:table-row>
        <table:table-row table:style-name="Table12.1">
          <table:table-cell table:style-name="Table12.A1" office:value-type="string">
            <text:p text:style-name="P3">C-08</text:p>
          </table:table-cell>
          <table:table-cell table:style-name="Table12.A1" office:value-type="string">
            <text:p text:style-name="P3">Infrastructure management is outside the scope of the Salesforce solution.</text:p>
          </table:table-cell>
        </table:table-row>
      </table:table>
      <text:p text:style-name="P3"/>
      <text:p text:style-name="P3"/>
      <text:p text:style-name="Heading_20_2"><text:bookmark text:name="_uzf6he6yvk4k"/></text:p>
      <text:p text:style-name="P116"><text:bookmark text:name="_qmlbpvoasbkk"/>6.3 Design Trade-offs</text:p>
      <text:p text:style-name="P3">Several architectural trade-offs were intentionally accepted.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"><text:span text:style-name="T3">Decision</text:span></text:p>
          </table:table-cell>
          <table:table-cell table:style-name="Table13.A1" office:value-type="string">
            <text:p text:style-name="P4"><text:span text:style-name="T3">Benefit</text:span></text:p>
          </table:table-cell>
          <table:table-cell table:style-name="Table13.A1" office:value-type="string">
            <text:p text:style-name="P4"><text:span text:style-name="T3">Trade-off</text:span></text:p>
          </table:table-cell>
        </table:table-row>
        <table:table-row table:style-name="Table13.2">
          <table:table-cell table:style-name="Table13.A1" office:value-type="string">
            <text:p text:style-name="P3">Introduce Grant Application object</text:p>
          </table:table-cell>
          <table:table-cell table:style-name="Table13.A1" office:value-type="string">
            <text:p text:style-name="P3">Better normalization</text:p>
          </table:table-cell>
          <table:table-cell table:style-name="Table13.A1" office:value-type="string">
            <text:p text:style-name="P3">Additional custom object</text:p>
          </table:table-cell>
        </table:table-row>
        <table:table-row table:style-name="Table13.2">
          <table:table-cell table:style-name="Table13.A1" office:value-type="string">
            <text:p text:style-name="P3">Use Flow for orchestration</text:p>
          </table:table-cell>
          <table:table-cell table:style-name="Table13.A1" office:value-type="string">
            <text:p text:style-name="P3">Easier administration</text:p>
          </table:table-cell>
          <table:table-cell table:style-name="Table13.A1" office:value-type="string">
            <text:p text:style-name="P3">Multiple automation technologies</text:p>
          </table:table-cell>
        </table:table-row>
        <table:table-row table:style-name="Table13.1">
          <table:table-cell table:style-name="Table13.A1" office:value-type="string">
            <text:p text:style-name="P3">Use Apex Service Layer</text:p>
          </table:table-cell>
          <table:table-cell table:style-name="Table13.A1" office:value-type="string">
            <text:p text:style-name="P3">Better scalability</text:p>
          </table:table-cell>
          <table:table-cell table:style-name="Table13.A1" office:value-type="string">
            <text:p text:style-name="P3">More implementation effort</text:p>
          </table:table-cell>
        </table:table-row>
        <table:table-row table:style-name="Table13.1">
          <table:table-cell table:style-name="Table13.A1" office:value-type="string">
            <text:p text:style-name="P3">Custom Metadata</text:p>
          </table:table-cell>
          <table:table-cell table:style-name="Table13.A1" office:value-type="string">
            <text:p text:style-name="P3">Configuration-driven</text:p>
          </table:table-cell>
          <table:table-cell table:style-name="Table13.A1" office:value-type="string">
            <text:p text:style-name="P3">Additional setup</text:p>
          </table:table-cell>
        </table:table-row>
        <table:table-row table:style-name="Table13.2">
          <table:table-cell table:style-name="Table13.A1" office:value-type="string">
            <text:p text:style-name="P3">Error Logging Framework</text:p>
          </table:table-cell>
          <table:table-cell table:style-name="Table13.A1" office:value-type="string">
            <text:p text:style-name="P3">Better operational support</text:p>
          </table:table-cell>
          <table:table-cell table:style-name="Table13.A1" office:value-type="string">
            <text:p text:style-name="P3">Increased storage usage</text:p>
          </table:table-cell>
        </table:table-row>
      </table:table>
      <text:p text:style-name="P3"/>
      <text:p text:style-name="P106"><text:bookmark text:name="_qhp3mdxvaxcq"/></text:p>
      <text:p text:style-name="P107"><text:bookmark text:name="_okrnqgolh0ft"/>7. Risks and Mitigation</text:p>
      <text:p text:style-name="Heading_20_2"><text:bookmark text:name="_hxet76cmz6xk"/>7.1 Overview</text:p>
      <text:p text:style-name="P3">Every enterprise solution introduces technical and operational risks.</text:p>
      <text:p text:style-name="P3">The proposed architecture includes mitigation strategies to reduce both the likelihood and impact of these risks.</text:p>
      <text:p text:style-name="Heading_20_2"><text:bookmark text:name="_yrtdee748wyi"/>7.2 Risk Register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4"><text:span text:style-name="T3">Risk ID</text:span></text:p>
          </table:table-cell>
          <table:table-cell table:style-name="Table14.A1" office:value-type="string">
            <text:p text:style-name="P4"><text:span text:style-name="T3">Risk</text:span></text:p>
          </table:table-cell>
          <table:table-cell table:style-name="Table14.A1" office:value-type="string">
            <text:p text:style-name="P4"><text:span text:style-name="T3">Impact</text:span></text:p>
          </table:table-cell>
          <table:table-cell table:style-name="Table14.A1" office:value-type="string">
            <text:p text:style-name="P4"><text:span text:style-name="T3">Mitigation</text:span></text:p>
          </table:table-cell>
        </table:table-row>
        <table:table-row table:style-name="Table14.1">
          <table:table-cell table:style-name="Table14.A1" office:value-type="string">
            <text:p text:style-name="P3">R-01</text:p>
          </table:table-cell>
          <table:table-cell table:style-name="Table14.A1" office:value-type="string">
            <text:p text:style-name="P3">External verification service unavailable</text:p>
          </table:table-cell>
          <table:table-cell table:style-name="Table14.A1" office:value-type="string">
            <text:p text:style-name="P3">Citizen verification cannot be completed</text:p>
          </table:table-cell>
          <table:table-cell table:style-name="Table14.A1" office:value-type="string">
            <text:p text:style-name="P3">Retry mechanism, centralized error logging, manual verification process</text:p>
          </table:table-cell>
        </table:table-row>
        <table:table-row table:style-name="Table14.1">
          <table:table-cell table:style-name="Table14.A1" office:value-type="string">
            <text:p text:style-name="P3">R-02</text:p>
          </table:table-cell>
          <table:table-cell table:style-name="Table14.A1" office:value-type="string">
            <text:p text:style-name="P3">Duplicate citizen applications</text:p>
          </table:table-cell>
          <table:table-cell table:style-name="Table14.A1" office:value-type="string">
            <text:p text:style-name="P3">Duplicate grant allocation</text:p>
          </table:table-cell>
          <table:table-cell table:style-name="Table14.A1" office:value-type="string">
            <text:p text:style-name="P3">Duplicate Rules, Matching Rules, external verification</text:p>
          </table:table-cell>
        </table:table-row>
        <table:table-row table:style-name="Table14.1">
          <table:table-cell table:style-name="Table14.A1" office:value-type="string">
            <text:p text:style-name="P3">R-03</text:p>
          </table:table-cell>
          <table:table-cell table:style-name="Table14.A1" office:value-type="string">
            <text:p text:style-name="P3">Salesforce governor limit exceeded</text:p>
          </table:table-cell>
          <table:table-cell table:style-name="Table14.A1" office:value-type="string">
            <text:p text:style-name="P3">Transaction failure</text:p>
          </table:table-cell>
          <table:table-cell table:style-name="Table14.A1" office:value-type="string">
            <text:p text:style-name="P3">Bulkification, optimized SOQL, efficient collections</text:p>
          </table:table-cell>
        </table:table-row>
        <table:table-row table:style-name="Table14.1">
          <table:table-cell table:style-name="Table14.A1" office:value-type="string">
            <text:p text:style-name="P3">R-04</text:p>
          </table:table-cell>
          <table:table-cell table:style-name="Table14.A1" office:value-type="string">
            <text:p text:style-name="P3">Business rules change frequently</text:p>
          </table:table-cell>
          <table:table-cell table:style-name="Table14.A1" office:value-type="string">
            <text:p text:style-name="P3">Frequent deployments</text:p>
          </table:table-cell>
          <table:table-cell table:style-name="Table14.A1" office:value-type="string">
            <text:p text:style-name="P3">Store configuration in Custom Metadata</text:p>
          </table:table-cell>
        </table:table-row>
        <table:table-row table:style-name="Table14.6">
          <table:table-cell table:style-name="Table14.A1" office:value-type="string">
            <text:p text:style-name="P3">R-05</text:p>
          </table:table-cell>
          <table:table-cell table:style-name="Table14.A1" office:value-type="string">
            <text:p text:style-name="P3">Large CSV imports</text:p>
          </table:table-cell>
          <table:table-cell table:style-name="Table14.A1" office:value-type="string">
            <text:p text:style-name="P3">Long processing time</text:p>
          </table:table-cell>
          <table:table-cell table:style-name="Table14.A1" office:value-type="string">
            <text:p text:style-name="P3">Batch Apex</text:p>
          </table:table-cell>
        </table:table-row>
        <table:table-row table:style-name="Table14.1">
          <table:table-cell table:style-name="Table14.A1" office:value-type="string">
            <text:p text:style-name="P3">R-06</text:p>
          </table:table-cell>
          <table:table-cell table:style-name="Table14.A1" office:value-type="string">
            <text:p text:style-name="P3">Integration timeout</text:p>
          </table:table-cell>
          <table:table-cell table:style-name="Table14.A1" office:value-type="string">
            <text:p text:style-name="P3">Delayed application processing</text:p>
          </table:table-cell>
          <table:table-cell table:style-name="Table14.A1" office:value-type="string">
            <text:p text:style-name="P3">Timeout handling, retry queue</text:p>
          </table:table-cell>
        </table:table-row>
        <table:table-row table:style-name="Table14.1">
          <table:table-cell table:style-name="Table14.A1" office:value-type="string">
            <text:p text:style-name="P3">R-07</text:p>
          </table:table-cell>
          <table:table-cell table:style-name="Table14.A1" office:value-type="string">
            <text:p text:style-name="P3">Invalid uploaded documents</text:p>
          </table:table-cell>
          <table:table-cell table:style-name="Table14.A1" office:value-type="string">
            <text:p text:style-name="P3">Application rejection</text:p>
          </table:table-cell>
          <table:table-cell table:style-name="Table14.A1" office:value-type="string">
            <text:p text:style-name="P3">Client-side and server-side validation</text:p>
          </table:table-cell>
        </table:table-row>
        <table:table-row table:style-name="Table14.1">
          <table:table-cell table:style-name="Table14.A1" office:value-type="string">
            <text:p text:style-name="P3">R-08</text:p>
          </table:table-cell>
          <table:table-cell table:style-name="Table14.A1" office:value-type="string">
            <text:p text:style-name="P3">Unexpected Apex exception</text:p>
          </table:table-cell>
          <table:table-cell table:style-name="Table14.A1" office:value-type="string">
            <text:p text:style-name="P3">Transaction rollback</text:p>
          </table:table-cell>
          <table:table-cell table:style-name="Table14.A1" office:value-type="string">
            <text:p text:style-name="P3">Centralized exception framework</text:p>
          </table:table-cell>
        </table:table-row>
        <table:table-row table:style-name="Table14.1">
          <table:table-cell table:style-name="Table14.A1" office:value-type="string">
            <text:p text:style-name="P3">R-09</text:p>
          </table:table-cell>
          <table:table-cell table:style-name="Table14.A1" office:value-type="string">
            <text:p text:style-name="P3">Unauthorized data access</text:p>
          </table:table-cell>
          <table:table-cell table:style-name="Table14.A1" office:value-type="string">
            <text:p text:style-name="P3">Security breach</text:p>
          </table:table-cell>
          <table:table-cell table:style-name="Table14.A1" office:value-type="string">
            <text:p text:style-name="P3">Salesforce security model, least privilege principle</text:p>
          </table:table-cell>
        </table:table-row>
        <table:table-row table:style-name="Table14.1">
          <table:table-cell table:style-name="Table14.A1" office:value-type="string">
            <text:p text:style-name="P3">R-10</text:p>
          </table:table-cell>
          <table:table-cell table:style-name="Table14.A1" office:value-type="string">
            <text:p text:style-name="P3">Future grant scheme changes</text:p>
          </table:table-cell>
          <table:table-cell table:style-name="Table14.A1" office:value-type="string">
            <text:p text:style-name="P3">High maintenance effort</text:p>
          </table:table-cell>
          <table:table-cell table:style-name="Table14.A1" office:value-type="string">
            <text:p text:style-name="P3">Metadata-driven architecture</text:p>
          </table:table-cell>
        </table:table-row>
      </table:table>
      <text:p text:style-name="P3"/>
      <text:p text:style-name="Heading_20_2"><text:bookmark text:name="_ecv82rsuc3wu"/>7.3 Operational Monitoring</text:p>
      <text:p text:style-name="P3">The solution includes centralized operational monitoring.</text:p>
      <text:p text:style-name="P3">Production incidents are captured using a dedicated error logging framework.</text:p>
      <text:p text:style-name="P3">Captured information includes:</text:p>
      <text:list xml:id="list477153135" text:style-name="WWNum24">
        <text:list-item>
          <text:p text:style-name="P36"><text:soft-page-break/>Transaction Identifier</text:p>
        </text:list-item>
        <text:list-item>
          <text:p text:style-name="P64">Timestamp</text:p>
        </text:list-item>
        <text:list-item>
          <text:p text:style-name="P64">User</text:p>
        </text:list-item>
        <text:list-item>
          <text:p text:style-name="P64">Error Category</text:p>
        </text:list-item>
        <text:list-item>
          <text:p text:style-name="P64">Exception Message</text:p>
        </text:list-item>
        <text:list-item>
          <text:p text:style-name="P64">Stack Trace</text:p>
        </text:list-item>
        <text:list-item>
          <text:p text:style-name="P64">Request Payload</text:p>
        </text:list-item>
        <text:list-item>
          <text:p text:style-name="P64">Response Payload</text:p>
        </text:list-item>
        <text:list-item>
          <text:p text:style-name="P64">Retry Count</text:p>
        </text:list-item>
        <text:list-item>
          <text:p text:style-name="P95">Processing Status</text:p>
        </text:list-item>
      </text:list>
      <text:p text:style-name="P3">Operational dashboards can be built using Salesforce Reports and Dashboards to monitor failed transactions and retry queues.</text:p>
      <text:p text:style-name="P3"/>
      <text:p text:style-name="Heading_20_2"><text:bookmark text:name="_rv5er5ifwbvr"/>7.4 Retry Strategy</text:p>
      <text:p text:style-name="P3">External integration failures are classified into retryable and non-retryable errors.</text:p>
      <text:p text:style-name="P3"><draw:frame draw:style-name="fr1" draw:name="image13.png" text:anchor-type="as-char" svg:width="5.5in" svg:height="3.9445in" draw:z-index="0"><draw:image xlink:href="Pictures/10000000000002110000017B624EAE207D6516E4.png" xlink:type="simple" xlink:show="embed" xlink:actuate="onLoad" loext:mime-type="image/png"/></draw:frame></text:p>
      <text:p text:style-name="P3">Retry attempts are limited to prevent infinite processing loops. Each retry updates the retry counter and processing status to provide complete operational visibility.</text:p>
      <text:p text:style-name="Heading_20_2"><text:bookmark text:name="_nmvyxx89was2"/>7.5 Disaster Recovery Considerations</text:p>
      <text:p text:style-name="P3">The proposed solution relies on Salesforce Platform resilience and disaster recovery capabilities.</text:p>
      <text:p text:style-name="P3">Additional operational recommendations include:</text:p>
      <text:list xml:id="list3995840640" text:style-name="WWNum22">
        <text:list-item>
          <text:p text:style-name="P37">Scheduled data exports</text:p>
        </text:list-item>
        <text:list-item>
          <text:p text:style-name="P65">Version-controlled source code repository</text:p>
        </text:list-item>
        <text:list-item>
          <text:p text:style-name="P65"><text:soft-page-break/>Automated deployment pipeline</text:p>
        </text:list-item>
        <text:list-item>
          <text:p text:style-name="P65">Backup strategy for metadata</text:p>
        </text:list-item>
        <text:list-item>
          <text:p text:style-name="P65">Monitoring of integration endpoints</text:p>
        </text:list-item>
        <text:list-item>
          <text:p text:style-name="P96">Production alerting for failed integration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14" meta:object-count="0" meta:page-count="38" meta:paragraph-count="663" meta:word-count="3265" meta:character-count="25105" meta:non-whitespace-character-count="22665"/>
    <meta:generator>LibreOfficeDev/6.0.5.2$Linux_X86_64 LibreOffice_project/</meta:generator>
  </office:meta>
</office:document-meta>
</file>